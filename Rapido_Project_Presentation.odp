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8faf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6b3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d6e4f0" draw:fill="solid" draw:fill-color="#d6e4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6b35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width="0cm" draw:fill="solid" draw:fill-color="#1e3a5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b4d8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solid" draw:fill-color="#00b4d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cc96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solid" draw:fill-color="#00cc9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>
      <style:graphic-properties draw:stroke="solid" svg:stroke-width="0.035cm" svg:stroke-color="#a855f7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solid" draw:fill-color="#a855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ffa15a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solid" draw:fill-color="#ffa15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64748b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solid" draw:fill-color="#64748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>
      <style:graphic-properties draw:stroke="solid" svg:stroke-width="0.035cm" svg:stroke-color="#94a3b8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solid" draw:fill-color="#94a3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ff6b35" draw:fill="solid" draw:fill-color="#ff6b3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b4d8" draw:fill="solid" draw:fill-color="#00b4d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cc96" draw:fill="solid" draw:fill-color="#00cc9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>
      <style:graphic-properties draw:stroke="solid" svg:stroke-width="0.035cm" svg:stroke-color="#a855f7" draw:fill="solid" draw:fill-color="#a855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>
      <style:graphic-properties draw:stroke="solid" svg:stroke-width="0.035cm" svg:stroke-color="#ffa15a" draw:fill="solid" draw:fill-color="#ffa15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>
      <style:graphic-properties draw:stroke="solid" svg:stroke-width="0.035cm" svg:stroke-color="#ef553b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ef553b" draw:fill="solid" draw:fill-color="#ef553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solid" draw:fill-color="#ef553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>
      <style:graphic-properties draw:stroke="solid" svg:stroke-width="0.035cm" svg:stroke-color="#ec4899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width="0cm" draw:fill="solid" draw:fill-color="#ec48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1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6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0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3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6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9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2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5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8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1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4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7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0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3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9" style:family="graphic" style:parent-style-name="standard">
      <style:graphic-properties draw:stroke="solid" svg:stroke-width="0.035cm" svg:stroke-color="#334155" draw:fill="solid" draw:fill-color="#eef2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ff6b35" draw:fill="solid" draw:fill-color="#0f17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5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8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1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4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0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1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3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4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5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6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7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9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4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8fafc"/>
      <style:paragraph-properties fo:text-align="start"/>
      <style:text-properties fo:font-size="18pt"/>
    </style:style>
    <style:style style:name="P2" style:family="paragraph">
      <loext:graphic-properties draw:fill="solid" draw:fill-color="#ff6b35"/>
      <style:paragraph-properties fo:text-align="start"/>
      <style:text-properties fo:font-size="18pt"/>
    </style:style>
    <style:style style:name="P3" style:family="paragraph">
      <loext:graphic-properties draw:fill="solid" draw:fill-color="#d6e4f0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eef2f7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1e3a5f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solid" draw:fill-color="#00b4d8"/>
      <style:paragraph-properties fo:text-align="start"/>
      <style:text-properties fo:font-size="18pt"/>
    </style:style>
    <style:style style:name="P16" style:family="paragraph">
      <loext:graphic-properties draw:fill="solid" draw:fill-color="#00cc96"/>
      <style:paragraph-properties fo:text-align="start"/>
      <style:text-properties fo:font-size="18pt"/>
    </style:style>
    <style:style style:name="P17" style:family="paragraph">
      <loext:graphic-properties draw:fill="solid" draw:fill-color="#a855f7"/>
      <style:paragraph-properties fo:text-align="start"/>
      <style:text-properties fo:font-size="18pt"/>
    </style:style>
    <style:style style:name="P18" style:family="paragraph">
      <loext:graphic-properties draw:fill="solid" draw:fill-color="#ffa15a"/>
      <style:paragraph-properties fo:text-align="start"/>
      <style:text-properties fo:font-size="18pt"/>
    </style:style>
    <style:style style:name="P19" style:family="paragraph">
      <loext:graphic-properties draw:fill="solid" draw:fill-color="#64748b"/>
      <style:paragraph-properties fo:text-align="start"/>
      <style:text-properties fo:font-size="18pt"/>
    </style:style>
    <style:style style:name="P20" style:family="paragraph">
      <loext:graphic-properties draw:fill="solid" draw:fill-color="#94a3b8"/>
      <style:paragraph-properties fo:text-align="start"/>
      <style:text-properties fo:font-size="18pt"/>
    </style:style>
    <style:style style:name="P21" style:family="paragraph">
      <loext:graphic-properties draw:fill="solid" draw:fill-color="#ef553b"/>
      <style:paragraph-properties fo:text-align="start"/>
      <style:text-properties fo:font-size="18pt"/>
    </style:style>
    <style:style style:name="P22" style:family="paragraph">
      <loext:graphic-properties draw:fill="solid" draw:fill-color="#ec4899"/>
      <style:paragraph-properties fo:text-align="start"/>
      <style:text-properties fo:font-size="18pt"/>
    </style:style>
    <style:style style:name="P23" style:family="paragraph">
      <loext:graphic-properties draw:fill="solid" draw:fill-color="#0f172a"/>
      <style:paragraph-properties fo:text-align="start"/>
      <style:text-properties fo:font-size="18pt"/>
    </style:style>
    <style:style style:name="T1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bold" fo:background-color="transparent" style:font-name-asian="Calibri4" style:font-size-asian="44pt" style:font-style-asian="normal" style:font-weight-asian="bold" style:font-name-complex="Calibri2" style:font-size-complex="44pt" style:font-style-complex="normal" style:font-weight-complex="bold"/>
    </style:style>
    <style:style style:name="T2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30pt" fo:letter-spacing="normal" fo:language="en" fo:country="US" fo:font-style="normal" style:text-underline-style="none" fo:font-weight="bold" fo:background-color="transparent" style:font-name-asian="Calibri4" style:font-size-asian="30pt" style:font-style-asian="normal" style:font-weight-asian="bold" style:font-name-complex="Calibri2" style:font-size-complex="30pt" style:font-style-complex="normal" style:font-weight-complex="bold"/>
    </style:style>
    <style:style style:name="T3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7pt" fo:letter-spacing="normal" fo:language="en" fo:country="US" fo:font-style="normal" style:text-underline-style="none" fo:font-weight="normal" fo:background-color="transparent" style:font-name-asian="Calibri4" style:font-size-asian="17pt" style:font-style-asian="normal" style:font-weight-asian="normal" style:font-name-complex="Calibri2" style:font-size-complex="17pt" style:font-style-complex="normal" style:font-weight-complex="normal"/>
    </style:style>
    <style:style style:name="T4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5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name-asian="Calibri4" style:font-size-asian="22pt" style:font-style-asian="normal" style:font-weight-asian="bold" style:font-name-complex="Calibri2" style:font-size-complex="22pt" style:font-style-complex="normal" style:font-weight-complex="bold"/>
    </style:style>
    <style:style style:name="T6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Calibri4" style:font-size-asian="20pt" style:font-style-asian="normal" style:font-weight-asian="bold" style:font-name-complex="Calibri2" style:font-size-complex="20pt" style:font-style-complex="normal" style:font-weight-complex="bold"/>
    </style:style>
    <style:style style:name="T7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8fafc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name-asian="Calibri4" style:font-size-asian="26pt" style:font-style-asian="normal" style:font-weight-asian="bold" style:font-name-complex="Calibri2" style:font-size-complex="26pt" style:font-style-complex="normal" style:font-weight-complex="bold"/>
    </style:style>
    <style:style style:name="T10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4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1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name-asian="Calibri4" style:font-size-asian="14pt" style:font-style-asian="normal" style:font-weight-asian="bold" style:font-name-complex="Calibri2" style:font-size-complex="14pt" style:font-style-complex="normal" style:font-weight-complex="bold"/>
    </style:style>
    <style:style style:name="T12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4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5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9.5pt" fo:letter-spacing="normal" fo:language="en" fo:country="US" fo:font-style="normal" style:text-underline-style="none" fo:font-weight="normal" fo:background-color="transparent" style:font-name-asian="Calibri4" style:font-size-asian="9.5pt" style:font-style-asian="normal" style:font-weight-asian="normal" style:font-name-complex="Calibri2" style:font-size-complex="9.5pt" style:font-style-complex="normal" style:font-weight-complex="normal"/>
    </style:style>
    <style:style style:name="T16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17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4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8" style:family="text">
      <style:text-properties fo:font-variant="normal" fo:text-transform="none" fo:color="#00b4d8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19" style:family="text">
      <style:text-properties fo:font-variant="normal" fo:text-transform="none" fo:color="#00cc96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20" style:family="text">
      <style:text-properties fo:font-variant="normal" fo:text-transform="none" fo:color="#a855f7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21" style:family="text">
      <style:text-properties fo:font-variant="normal" fo:text-transform="none" fo:color="#ffa15a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22" style:family="text">
      <style:text-properties fo:font-variant="normal" fo:text-transform="none" fo:color="#64748b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23" style:family="text">
      <style:text-properties fo:font-variant="normal" fo:text-transform="none" fo:color="#94a3b8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24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25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6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4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27" style:family="text">
      <style:text-properties fo:font-variant="normal" fo:text-transform="none" fo:color="#00b4d8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8" style:family="text">
      <style:text-properties fo:font-variant="normal" fo:text-transform="none" fo:color="#00cc96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29" style:family="text">
      <style:text-properties fo:font-variant="normal" fo:text-transform="none" fo:color="#a855f7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30" style:family="text">
      <style:text-properties fo:font-variant="normal" fo:text-transform="none" fo:color="#ffa15a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31" style:family="text">
      <style:text-properties fo:font-variant="normal" fo:text-transform="none" fo:color="#ef553b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32" style:family="text">
      <style:text-properties fo:font-variant="normal" fo:text-transform="none" fo:color="#5a6a7a" loext:opacity="100%" style:text-line-through-style="none" style:text-line-through-type="none" style:text-position="0% 100%" style:font-name="Calibri2" fo:font-size="9.5pt" fo:letter-spacing="normal" fo:language="en" fo:country="US" fo:font-style="normal" style:text-underline-style="none" fo:font-weight="normal" fo:background-color="transparent" style:font-name-asian="Calibri4" style:font-size-asian="9.5pt" style:font-style-asian="normal" style:font-weight-asian="normal" style:font-name-complex="Calibri2" style:font-size-complex="9.5pt" style:font-style-complex="normal" style:font-weight-complex="normal"/>
    </style:style>
    <style:style style:name="T33" style:family="text">
      <style:text-properties fo:font-variant="normal" fo:text-transform="none" fo:color="#ef553b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34" style:family="text">
      <style:text-properties fo:font-variant="normal" fo:text-transform="none" fo:color="#ec4899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4" style:font-size-asian="11pt" style:font-style-asian="normal" style:font-weight-asian="bold" style:font-name-complex="Calibri2" style:font-size-complex="11pt" style:font-style-complex="normal" style:font-weight-complex="bold"/>
    </style:style>
    <style:style style:name="T35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4" style:font-size-asian="13pt" style:font-style-asian="normal" style:font-weight-asian="bold" style:font-name-complex="Calibri2" style:font-size-complex="13pt" style:font-style-complex="normal" style:font-weight-complex="bold"/>
    </style:style>
    <style:style style:name="T36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name-asian="Calibri4" style:font-size-asian="32pt" style:font-style-asian="normal" style:font-weight-asian="bold" style:font-name-complex="Calibri2" style:font-size-complex="32pt" style:font-style-complex="normal" style:font-weight-complex="bold"/>
    </style:style>
    <style:style style:name="T37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8.5pt" fo:letter-spacing="normal" fo:language="en" fo:country="US" fo:font-style="normal" style:text-underline-style="none" fo:font-weight="bold" fo:background-color="transparent" style:font-name-asian="Calibri4" style:font-size-asian="8.5pt" style:font-style-asian="normal" style:font-weight-asian="bold" style:font-name-complex="Calibri2" style:font-size-complex="8.5pt" style:font-style-complex="normal" style:font-weight-complex="bold"/>
    </style:style>
    <style:style style:name="T38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Calibri4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40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9.5pt" fo:letter-spacing="normal" fo:language="en" fo:country="US" fo:font-style="normal" style:text-underline-style="none" fo:font-weight="bold" fo:background-color="transparent" style:font-name-asian="Calibri4" style:font-size-asian="9.5pt" style:font-style-asian="normal" style:font-weight-asian="bold" style:font-name-complex="Calibri2" style:font-size-complex="9.5pt" style:font-style-complex="normal" style:font-weight-complex="bold"/>
    </style:style>
    <style:style style:name="T41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8.5pt" fo:letter-spacing="normal" fo:language="en" fo:country="US" fo:font-style="normal" style:text-underline-style="none" fo:font-weight="normal" fo:background-color="transparent" style:font-name-asian="Calibri4" style:font-size-asian="8.5pt" style:font-style-asian="normal" style:font-weight-asian="normal" style:font-name-complex="Calibri2" style:font-size-complex="8.5pt" style:font-style-complex="normal" style:font-weight-complex="normal"/>
    </style:style>
    <style:style style:name="T42" style:family="text">
      <style:text-properties fo:font-variant="normal" fo:text-transform="none" fo:color="#00b4d8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43" style:family="text">
      <style:text-properties fo:font-variant="normal" fo:text-transform="none" fo:color="#00cc96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44" style:family="text">
      <style:text-properties fo:font-variant="normal" fo:text-transform="none" fo:color="#a855f7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45" style:family="text">
      <style:text-properties fo:font-variant="normal" fo:text-transform="none" fo:color="#ffa15a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4" style:font-size-asian="12pt" style:font-style-asian="normal" style:font-weight-asian="bold" style:font-name-complex="Calibri2" style:font-size-complex="12pt" style:font-style-complex="normal" style:font-weight-complex="bold"/>
    </style:style>
    <style:style style:name="T46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9.5pt" fo:letter-spacing="normal" fo:language="en" fo:country="US" fo:font-style="normal" style:text-underline-style="none" fo:font-weight="normal" fo:background-color="transparent" style:font-name-asian="Calibri4" style:font-size-asian="9.5pt" style:font-style-asian="normal" style:font-weight-asian="normal" style:font-name-complex="Calibri2" style:font-size-complex="9.5pt" style:font-style-complex="normal" style:font-weight-complex="normal"/>
    </style:style>
    <style:style style:name="T47" style:family="text">
      <style:text-properties fo:font-variant="normal" fo:text-transform="none" fo:color="#ff6b35" loext:opacity="100%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bold" fo:background-color="transparent" style:font-name-asian="Courier New2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name-asian="Calibri4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49" style:family="text">
      <style:text-properties fo:font-variant="normal" fo:text-transform="none" fo:color="#ff6b35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2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0" style:family="text">
      <style:text-properties fo:font-variant="normal" fo:text-transform="none" fo:color="#cccccc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2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1" style:family="text">
      <style:text-properties fo:font-variant="normal" fo:text-transform="none" fo:color="#00b4d8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2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2" style:family="text">
      <style:text-properties fo:font-variant="normal" fo:text-transform="none" fo:color="#00cc96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2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3" style:family="text">
      <style:text-properties fo:font-variant="normal" fo:text-transform="none" fo:color="#ffa15a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2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4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55" style:family="text">
      <style:text-properties fo:font-variant="normal" fo:text-transform="none" fo:color="#00b4d8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56" style:family="text">
      <style:text-properties fo:font-variant="normal" fo:text-transform="none" fo:color="#00cc96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57" style:family="text">
      <style:text-properties fo:font-variant="normal" fo:text-transform="none" fo:color="#a855f7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58" style:family="text">
      <style:text-properties fo:font-variant="normal" fo:text-transform="none" fo:color="#ffa15a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59" style:family="text">
      <style:text-properties fo:font-variant="normal" fo:text-transform="none" fo:color="#ef553b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60" style:family="text">
      <style:text-properties fo:font-variant="normal" fo:text-transform="none" fo:color="#64748b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4" style:font-size-asian="10pt" style:font-style-asian="normal" style:font-weight-asian="bold" style:font-name-complex="Calibri2" style:font-size-complex="10pt" style:font-style-complex="normal" style:font-weight-complex="bold"/>
    </style:style>
    <style:style style:name="T61" style:family="text">
      <style:text-properties fo:font-variant="normal" fo:text-transform="none" fo:color="#ff6b35" loext:opacity="100%" style:text-line-through-style="none" style:text-line-through-type="none" style:text-position="0% 100%" style:font-name="Calibri2" fo:font-size="46pt" fo:letter-spacing="normal" fo:language="en" fo:country="US" fo:font-style="normal" style:text-underline-style="none" fo:font-weight="bold" fo:background-color="transparent" style:font-name-asian="Calibri4" style:font-size-asian="46pt" style:font-style-asian="normal" style:font-weight-asian="bold" style:font-name-complex="Calibri2" style:font-size-complex="46pt" style:font-style-complex="normal" style:font-weight-complex="bold"/>
    </style:style>
    <style:style style:name="T62" style:family="text">
      <style:text-properties fo:font-variant="normal" fo:text-transform="none" fo:color="#1e3a5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Calibri4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3" style:family="text">
      <style:text-properties fo:font-variant="normal" fo:text-transform="none" fo:color="#445566" loext:opacity="100%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normal" fo:background-color="transparent" style:font-name-asian="Calibri4" style:font-size-asian="11.5pt" style:font-style-asian="normal" style:font-weight-asian="normal" style:font-name-complex="Calibri2" style:font-size-complex="11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6b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e3a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55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8fa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b4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cc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a855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a1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f55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5a6a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ec4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456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8.889cm" svg:height="8.889cm" svg:x="19.05cm" svg:y="-2.0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" draw:style-name="gr3" draw:text-style-name="P3" draw:layer="layout" svg:width="5.587cm" svg:height="5.587cm" svg:x="20.828cm" svg:y="8.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4" draw:text-style-name="P5" draw:layer="layout" svg:width="22.859cm" svg:height="1.904cm" svg:x="1.016cm" svg:y="2.286cm">
          <text:p text:style-name="P4"><text:span text:style-name="T1">RAP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5" draw:layer="layout" svg:width="22.859cm" svg:height="1.65cm" svg:x="1.016cm" svg:y="4.064cm">
          <text:p text:style-name="P4"><text:span text:style-name="T2">Intelligent Mobility Ins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" draw:text-style-name="P5" draw:layer="layout" svg:width="22.859cm" svg:height="1.142cm" svg:x="1.016cm" svg:y="5.639cm">
          <text:p text:style-name="P4"><text:span text:style-name="T3">Ride Patterns, Cancellations &amp; Far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" draw:text-style-name="P2" draw:layer="layout" svg:width="13.969cm" svg:height="0.101cm" svg:x="1.016cm" svg:y="7.0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" draw:text-style-name="P5" draw:layer="layout" svg:width="22.859cm" svg:height="0.761cm" svg:x="1.016cm" svg:y="7.493cm">
          <text:p text:style-name="P4"><text:span text:style-name="T4">Domain: Mobility &amp; Transportation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" draw:text-style-name="P5" draw:layer="layout" svg:width="22.859cm" svg:height="0.761cm" svg:x="1.016cm" svg:y="8.306cm">
          <text:p text:style-name="P4"><text:span text:style-name="T4">Skills: Python <text:s/>. <text:s/>Machine Learning <text:s/>. <text:s/>SQL <text:s/>. <text:s/>Streamlit <text:s/>. <text:s/>Data Clea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" draw:text-style-name="P5" draw:layer="layout" svg:width="20.319cm" svg:height="1.269cm" svg:x="1.016cm" svg:y="9.144cm">
          <text:p text:style-name="P4"><text:span text:style-name="T5">Lakshana Muruges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6" draw:layer="layout" svg:width="5.333cm" svg:height="2.285cm" svg:x="1.016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" draw:text-style-name="P8" draw:layer="layout" svg:width="5.333cm" svg:height="1.142cm" svg:x="1.016cm" svg:y="10.465cm">
          <text:p text:style-name="P7"><text:span text:style-name="T6">100K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" draw:text-style-name="P8" draw:layer="layout" svg:width="5.333cm" svg:height="0.761cm" svg:x="1.016cm" svg:y="11.481cm">
          <text:p text:style-name="P7"><text:span text:style-name="T7">Book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6" draw:layer="layout" svg:width="5.333cm" svg:height="2.285cm" svg:x="6.985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3" draw:text-style-name="P8" draw:layer="layout" svg:width="5.333cm" svg:height="1.142cm" svg:x="6.985cm" svg:y="10.465cm">
          <text:p text:style-name="P7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" draw:text-style-name="P8" draw:layer="layout" svg:width="5.333cm" svg:height="0.761cm" svg:x="6.985cm" svg:y="11.481cm">
          <text:p text:style-name="P7"><text:span text:style-name="T7">ML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" draw:text-style-name="P6" draw:layer="layout" svg:width="5.333cm" svg:height="2.285cm" svg:x="12.954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5" draw:text-style-name="P8" draw:layer="layout" svg:width="5.333cm" svg:height="1.142cm" svg:x="12.954cm" svg:y="10.465cm">
          <text:p text:style-name="P7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6" draw:text-style-name="P8" draw:layer="layout" svg:width="5.333cm" svg:height="0.761cm" svg:x="12.954cm" svg:y="11.481cm">
          <text:p text:style-name="P7"><text:span text:style-name="T7">C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6" draw:layer="layout" svg:width="5.333cm" svg:height="2.285cm" svg:x="18.923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7" draw:text-style-name="P8" draw:layer="layout" svg:width="5.333cm" svg:height="1.142cm" svg:x="18.923cm" svg:y="10.465cm">
          <text:p text:style-name="P7"><text:span text:style-name="T6">92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8" draw:text-style-name="P8" draw:layer="layout" svg:width="5.333cm" svg:height="0.761cm" svg:x="18.923cm" svg:y="11.481cm">
          <text:p text:style-name="P7"><text:span text:style-name="T7">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" draw:text-style-name="P5" draw:layer="layout" svg:width="22.859cm" svg:height="1.65cm" svg:x="1.016cm" svg:y="0.305cm">
          <text:p text:style-name="P4"><text:span text:style-name="T9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" draw:text-style-name="P5" draw:layer="layout" svg:width="23.367cm" svg:height="1.904cm" svg:x="1.016cm" svg:y="2.54cm">
          <text:p text:style-name="P4"><text:span text:style-name="T10">Rapido operates a large-scale ride-hailing platform facing critical operational challenges despite collecting rich trip-level data across bookings, customers, drivers, locations, and time signa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6" draw:layer="layout" svg:width="11.175cm" svg:height="3.301cm" svg:x="0.762cm" svg:y="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" draw:text-style-name="P5" draw:layer="layout" svg:width="10.413cm" svg:height="1.066cm" svg:x="1.143cm" svg:y="4.953cm">
          <text:p text:style-name="P4"><text:span text:style-name="T11">❌ <text:s/></text:span><text:span text:style-name="T11">Ride Cancel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5" draw:layer="layout" svg:width="10.413cm" svg:height="1.574cm" svg:x="1.143cm" svg:y="6.02cm">
          <text:p text:style-name="P4"><text:span text:style-name="T12">High cancellation rates impact revenue and customer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6" draw:layer="layout" svg:width="11.175cm" svg:height="3.301cm" svg:x="12.827cm" svg:y="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" draw:text-style-name="P5" draw:layer="layout" svg:width="10.413cm" svg:height="1.066cm" svg:x="13.208cm" svg:y="4.953cm">
          <text:p text:style-name="P4"><text:span text:style-name="T11">💰 <text:s/></text:span><text:span text:style-name="T11">Inaccurate F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6" draw:text-style-name="P5" draw:layer="layout" svg:width="10.413cm" svg:height="1.574cm" svg:x="13.208cm" svg:y="6.02cm">
          <text:p text:style-name="P4"><text:span text:style-name="T12">Poor fare estimation leads to customer dis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" draw:text-style-name="P6" draw:layer="layout" svg:width="11.175cm" svg:height="3.301cm" svg:x="0.762cm" svg:y="8.6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7" draw:text-style-name="P5" draw:layer="layout" svg:width="10.413cm" svg:height="1.066cm" svg:x="1.143cm" svg:y="8.89cm">
          <text:p text:style-name="P4"><text:span text:style-name="T11">🚗 <text:s/></text:span><text:span text:style-name="T11">Inefficient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8" draw:text-style-name="P5" draw:layer="layout" svg:width="10.413cm" svg:height="1.574cm" svg:x="1.143cm" svg:y="9.957cm">
          <text:p text:style-name="P4"><text:span text:style-name="T12">Suboptimal driver allocation during peak demand peri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6" draw:layer="layout" svg:width="11.175cm" svg:height="3.301cm" svg:x="12.827cm" svg:y="8.6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9" draw:text-style-name="P5" draw:layer="layout" svg:width="10.413cm" svg:height="1.066cm" svg:x="13.208cm" svg:y="8.89cm">
          <text:p text:style-name="P4"><text:span text:style-name="T11">📉 <text:s/></text:span><text:span text:style-name="T11">Poor CX at P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0" draw:text-style-name="P5" draw:layer="layout" svg:width="10.413cm" svg:height="1.574cm" svg:x="13.208cm" svg:y="9.957cm">
          <text:p text:style-name="P4"><text:span text:style-name="T12">Customer experience degrades during high-demand 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" draw:text-style-name="P2" draw:layer="layout" svg:width="23.875cm" svg:height="1.269cm" svg:x="0.762cm" svg:y="12.5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1" draw:text-style-name="P8" draw:layer="layout" svg:width="23.875cm" svg:height="1.269cm" svg:x="0.762cm" svg:y="12.573cm">
          <text:p text:style-name="P7"><text:span text:style-name="T13">Objective: Build a unified ML-driven decision system to predict outcomes, optimize pricing &amp; proactively manage ri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" draw:text-style-name="P5" draw:layer="layout" svg:width="22.859cm" svg:height="1.65cm" svg:x="1.016cm" svg:y="0.305cm">
          <text:p text:style-name="P4"><text:span text:style-name="T9">Datase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" draw:text-style-name="P5" draw:layer="layout" svg:width="22.859cm" svg:height="0.888cm" svg:x="1.016cm" svg:y="2.489cm">
          <text:p text:style-name="P4"><text:span text:style-name="T10">7 Files Loaded <text:s/>. <text:s/>5 CSV <text:s/>+ <text:s/>2 XLSX <text:s/>. <text:s/>Total: 1,44,461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6" draw:layer="layout" svg:width="23.875cm" svg:height="1.32cm" svg:x="0.762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0.228cm" svg:height="1.32cm" svg:x="0.762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5" draw:layer="layout" svg:width="6.603cm" svg:height="0.71cm" svg:x="1.321cm" svg:y="3.683cm">
          <text:p text:style-name="P4"><text:span text:style-name="T14">bookings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5" draw:text-style-name="P5" draw:layer="layout" svg:width="14.731cm" svg:height="0.558cm" svg:x="1.321cm" svg:y="4.293cm">
          <text:p text:style-name="P4"><text:span text:style-name="T15">Core transactional data - booking outcomes &amp; fare targ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6" draw:text-style-name="P14" draw:layer="layout" svg:width="3.555cm" svg:height="0.558cm" svg:x="17.272cm" svg:y="3.683cm">
          <text:p text:style-name="P13"><text:span text:style-name="T16">100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7" draw:text-style-name="P14" draw:layer="layout" svg:width="3.555cm" svg:height="0.507cm" svg:x="17.272cm" svg:y="4.293cm">
          <text:p text:style-name="P13"><text:span text:style-name="T17">22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8" draw:text-style-name="P6" draw:layer="layout" svg:width="23.875cm" svg:height="1.32cm" svg:x="0.762cm" svg:y="5.0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9" draw:text-style-name="P15" draw:layer="layout" svg:width="0.228cm" svg:height="1.32cm" svg:x="0.762cm" svg:y="5.0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0" draw:text-style-name="P5" draw:layer="layout" svg:width="6.603cm" svg:height="0.71cm" svg:x="1.321cm" svg:y="5.144cm">
          <text:p text:style-name="P4"><text:span text:style-name="T18">customers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1" draw:text-style-name="P5" draw:layer="layout" svg:width="14.731cm" svg:height="0.558cm" svg:x="1.321cm" svg:y="5.753cm">
          <text:p text:style-name="P4"><text:span text:style-name="T15">Customer behaviour &amp; historical cancellation sig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" draw:text-style-name="P14" draw:layer="layout" svg:width="3.555cm" svg:height="0.558cm" svg:x="17.272cm" svg:y="5.144cm">
          <text:p text:style-name="P13"><text:span text:style-name="T16">10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3" draw:text-style-name="P14" draw:layer="layout" svg:width="3.555cm" svg:height="0.507cm" svg:x="17.272cm" svg:y="5.753cm">
          <text:p text:style-name="P13"><text:span text:style-name="T17">13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4" draw:text-style-name="P6" draw:layer="layout" svg:width="23.875cm" svg:height="1.32cm" svg:x="0.762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5" draw:text-style-name="P16" draw:layer="layout" svg:width="0.228cm" svg:height="1.32cm" svg:x="0.762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6" draw:text-style-name="P5" draw:layer="layout" svg:width="6.603cm" svg:height="0.71cm" svg:x="1.321cm" svg:y="6.604cm">
          <text:p text:style-name="P4"><text:span text:style-name="T19">drivers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7" draw:text-style-name="P5" draw:layer="layout" svg:width="14.731cm" svg:height="0.558cm" svg:x="1.321cm" svg:y="7.214cm">
          <text:p text:style-name="P4"><text:span text:style-name="T15">Driver performance, delay &amp; reliability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8" draw:text-style-name="P14" draw:layer="layout" svg:width="3.555cm" svg:height="0.558cm" svg:x="17.272cm" svg:y="6.604cm">
          <text:p text:style-name="P13"><text:span text:style-name="T16">5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9" draw:text-style-name="P14" draw:layer="layout" svg:width="3.555cm" svg:height="0.507cm" svg:x="17.272cm" svg:y="7.214cm">
          <text:p text:style-name="P13"><text:span text:style-name="T17">14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50" draw:text-style-name="P6" draw:layer="layout" svg:width="23.875cm" svg:height="1.32cm" svg:x="0.762cm" svg:y="7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51" draw:text-style-name="P17" draw:layer="layout" svg:width="0.228cm" svg:height="1.32cm" svg:x="0.762cm" svg:y="7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2" draw:text-style-name="P5" draw:layer="layout" svg:width="6.603cm" svg:height="0.71cm" svg:x="1.321cm" svg:y="8.065cm">
          <text:p text:style-name="P4"><text:span text:style-name="T20">location_demand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53" draw:text-style-name="P5" draw:layer="layout" svg:width="14.731cm" svg:height="0.558cm" svg:x="1.321cm" svg:y="8.674cm">
          <text:p text:style-name="P4"><text:span text:style-name="T15">Aggregated demand patterns by location &amp;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4" draw:text-style-name="P14" draw:layer="layout" svg:width="3.555cm" svg:height="0.558cm" svg:x="17.272cm" svg:y="8.065cm">
          <text:p text:style-name="P13"><text:span text:style-name="T16">17,941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5" draw:text-style-name="P14" draw:layer="layout" svg:width="3.555cm" svg:height="0.507cm" svg:x="17.272cm" svg:y="8.674cm">
          <text:p text:style-name="P13"><text:span text:style-name="T17">10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56" draw:text-style-name="P6" draw:layer="layout" svg:width="23.875cm" svg:height="1.32cm" svg:x="0.762cm" svg:y="9.4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57" draw:text-style-name="P18" draw:layer="layout" svg:width="0.228cm" svg:height="1.32cm" svg:x="0.762cm" svg:y="9.4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8" draw:text-style-name="P5" draw:layer="layout" svg:width="6.603cm" svg:height="0.71cm" svg:x="1.321cm" svg:y="9.525cm">
          <text:p text:style-name="P4"><text:span text:style-name="T21">time_features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9" draw:text-style-name="P5" draw:layer="layout" svg:width="14.731cm" svg:height="0.558cm" svg:x="1.321cm" svg:y="10.135cm">
          <text:p text:style-name="P4"><text:span text:style-name="T15">Enriched temporal signals - hour, weekday, season, pea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0" draw:text-style-name="P14" draw:layer="layout" svg:width="3.555cm" svg:height="0.558cm" svg:x="17.272cm" svg:y="9.525cm">
          <text:p text:style-name="P13"><text:span text:style-name="T16">8,76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1" draw:text-style-name="P14" draw:layer="layout" svg:width="3.555cm" svg:height="0.507cm" svg:x="17.272cm" svg:y="10.135cm">
          <text:p text:style-name="P13"><text:span text:style-name="T17">7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62" draw:text-style-name="P6" draw:layer="layout" svg:width="23.875cm" svg:height="1.32cm" svg:x="0.762cm" svg:y="10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63" draw:text-style-name="P19" draw:layer="layout" svg:width="0.228cm" svg:height="1.32cm" svg:x="0.762cm" svg:y="10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64" draw:text-style-name="P5" draw:layer="layout" svg:width="6.603cm" svg:height="0.71cm" svg:x="1.321cm" svg:y="10.986cm">
          <text:p text:style-name="P4"><text:span text:style-name="T22">time_features.xls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65" draw:text-style-name="P5" draw:layer="layout" svg:width="14.731cm" svg:height="0.558cm" svg:x="1.321cm" svg:y="11.595cm">
          <text:p text:style-name="P4"><text:span text:style-name="T15">Same temporal signals - Excel format (version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6" draw:text-style-name="P14" draw:layer="layout" svg:width="3.555cm" svg:height="0.558cm" svg:x="17.272cm" svg:y="10.986cm">
          <text:p text:style-name="P13"><text:span text:style-name="T16">8,76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67" draw:text-style-name="P14" draw:layer="layout" svg:width="3.555cm" svg:height="0.507cm" svg:x="17.272cm" svg:y="11.595cm">
          <text:p text:style-name="P13"><text:span text:style-name="T17">7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8" draw:text-style-name="P6" draw:layer="layout" svg:width="23.875cm" svg:height="1.32cm" svg:x="0.762cm" svg:y="12.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9" draw:text-style-name="P20" draw:layer="layout" svg:width="0.228cm" svg:height="1.32cm" svg:x="0.762cm" svg:y="12.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70" draw:text-style-name="P5" draw:layer="layout" svg:width="6.603cm" svg:height="0.71cm" svg:x="1.321cm" svg:y="12.446cm">
          <text:p text:style-name="P4"><text:span text:style-name="T23">time_features_v2.xls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71" draw:text-style-name="P5" draw:layer="layout" svg:width="14.731cm" svg:height="0.558cm" svg:x="1.321cm" svg:y="13.056cm">
          <text:p text:style-name="P4"><text:span text:style-name="T15">Same temporal signals - Excel format (version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72" draw:text-style-name="P14" draw:layer="layout" svg:width="3.555cm" svg:height="0.558cm" svg:x="17.272cm" svg:y="12.446cm">
          <text:p text:style-name="P13"><text:span text:style-name="T16">8,76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73" draw:text-style-name="P14" draw:layer="layout" svg:width="3.555cm" svg:height="0.507cm" svg:x="17.272cm" svg:y="13.056cm">
          <text:p text:style-name="P13"><text:span text:style-name="T17">7 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4" draw:text-style-name="P5" draw:layer="layout" svg:width="22.859cm" svg:height="1.65cm" svg:x="1.016cm" svg:y="0.305cm">
          <text:p text:style-name="P4"><text:span text:style-name="T9">End-to-End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7.619cm" svg:height="4.952cm" svg:x="0.762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5" draw:text-style-name="P2" draw:layer="layout" svg:width="1.396cm" svg:height="1.396cm" svg:x="1.143cm" svg:y="3.0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76" draw:text-style-name="P8" draw:layer="layout" svg:width="1.396cm" svg:height="1.396cm" svg:x="1.143cm" svg:y="3.048cm">
          <text:p text:style-name="P7"><text:span text:style-name="T24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7" draw:text-style-name="P5" draw:layer="layout" svg:width="5.333cm" svg:height="1.142cm" svg:x="2.794cm" svg:y="3.175cm">
          <text:p text:style-name="P4"><text:span text:style-name="T25">Data Clea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8" draw:text-style-name="P5" draw:layer="layout" svg:width="6.984cm" svg:height="2.539cm" svg:x="1.143cm" svg:y="4.648cm">
          <text:p text:style-name="P4"><text:span text:style-name="T26">Fix missing values . Convert datetime . Encode categoric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8" draw:text-style-name="P6" draw:layer="layout" svg:width="7.619cm" svg:height="4.952cm" svg:x="8.8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9" draw:text-style-name="P15" draw:layer="layout" svg:width="1.396cm" svg:height="1.396cm" svg:x="9.271cm" svg:y="3.0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80" draw:text-style-name="P8" draw:layer="layout" svg:width="1.396cm" svg:height="1.396cm" svg:x="9.271cm" svg:y="3.048cm">
          <text:p text:style-name="P7"><text:span text:style-name="T24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1" draw:text-style-name="P5" draw:layer="layout" svg:width="5.333cm" svg:height="1.142cm" svg:x="10.922cm" svg:y="3.175cm">
          <text:p text:style-name="P4"><text:span text:style-name="T27">E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2" draw:text-style-name="P5" draw:layer="layout" svg:width="6.984cm" svg:height="2.539cm" svg:x="9.271cm" svg:y="4.648cm">
          <text:p text:style-name="P4"><text:span text:style-name="T26">13 charts - heatmaps, ride volumes, surge patterns, ra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4" draw:text-style-name="P6" draw:layer="layout" svg:width="7.619cm" svg:height="4.952cm" svg:x="17.01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3" draw:text-style-name="P16" draw:layer="layout" svg:width="1.396cm" svg:height="1.396cm" svg:x="17.399cm" svg:y="3.0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84" draw:text-style-name="P8" draw:layer="layout" svg:width="1.396cm" svg:height="1.396cm" svg:x="17.399cm" svg:y="3.048cm">
          <text:p text:style-name="P7"><text:span text:style-name="T24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5" draw:text-style-name="P5" draw:layer="layout" svg:width="5.333cm" svg:height="1.142cm" svg:x="19.05cm" svg:y="3.175cm">
          <text:p text:style-name="P4"><text:span text:style-name="T28">Feature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6" draw:text-style-name="P5" draw:layer="layout" svg:width="6.984cm" svg:height="2.539cm" svg:x="17.399cm" svg:y="4.648cm">
          <text:p text:style-name="P4"><text:span text:style-name="T26">7 new features - Fare/KM, Rush Hour, City Pair, Loyalty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0" draw:text-style-name="P6" draw:layer="layout" svg:width="7.619cm" svg:height="4.952cm" svg:x="0.762cm" svg:y="8.2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7" draw:text-style-name="P17" draw:layer="layout" svg:width="1.396cm" svg:height="1.396cm" svg:x="1.143cm" svg:y="8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88" draw:text-style-name="P8" draw:layer="layout" svg:width="1.396cm" svg:height="1.396cm" svg:x="1.143cm" svg:y="8.585cm">
          <text:p text:style-name="P7"><text:span text:style-name="T24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9" draw:text-style-name="P5" draw:layer="layout" svg:width="5.333cm" svg:height="1.142cm" svg:x="2.794cm" svg:y="8.712cm">
          <text:p text:style-name="P4"><text:span text:style-name="T29">Model 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0" draw:text-style-name="P5" draw:layer="layout" svg:width="6.984cm" svg:height="2.539cm" svg:x="1.143cm" svg:y="10.185cm">
          <text:p text:style-name="P4"><text:span text:style-name="T26">80/20 split . 4 ML models - RF &amp; Gradient Boo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56" draw:text-style-name="P6" draw:layer="layout" svg:width="7.619cm" svg:height="4.952cm" svg:x="8.89cm" svg:y="8.2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91" draw:text-style-name="P18" draw:layer="layout" svg:width="1.396cm" svg:height="1.396cm" svg:x="9.271cm" svg:y="8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92" draw:text-style-name="P8" draw:layer="layout" svg:width="1.396cm" svg:height="1.396cm" svg:x="9.271cm" svg:y="8.585cm">
          <text:p text:style-name="P7"><text:span text:style-name="T24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3" draw:text-style-name="P5" draw:layer="layout" svg:width="5.333cm" svg:height="1.142cm" svg:x="10.922cm" svg:y="8.712cm">
          <text:p text:style-name="P4"><text:span text:style-name="T30">Model 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94" draw:text-style-name="P5" draw:layer="layout" svg:width="6.984cm" svg:height="2.539cm" svg:x="9.271cm" svg:y="10.185cm">
          <text:p text:style-name="P4"><text:span text:style-name="T26">Accuracy, F1, AUC, CM, RMSE, MAE, R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95" draw:text-style-name="P6" draw:layer="layout" svg:width="7.619cm" svg:height="4.952cm" svg:x="17.018cm" svg:y="8.2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96" draw:text-style-name="P21" draw:layer="layout" svg:width="1.396cm" svg:height="1.396cm" svg:x="17.399cm" svg:y="8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97" draw:text-style-name="P8" draw:layer="layout" svg:width="1.396cm" svg:height="1.396cm" svg:x="17.399cm" svg:y="8.585cm">
          <text:p text:style-name="P7"><text:span text:style-name="T24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98" draw:text-style-name="P5" draw:layer="layout" svg:width="5.333cm" svg:height="1.142cm" svg:x="19.05cm" svg:y="8.712cm">
          <text:p text:style-name="P4"><text:span text:style-name="T31">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99" draw:text-style-name="P5" draw:layer="layout" svg:width="6.984cm" svg:height="2.539cm" svg:x="17.399cm" svg:y="10.185cm">
          <text:p text:style-name="P4"><text:span text:style-name="T26">Streamlit Dashboard . MySQL SQL Analytics . Live 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0" draw:text-style-name="P5" draw:layer="layout" svg:width="22.859cm" svg:height="1.65cm" svg:x="1.016cm" svg:y="0.305cm">
          <text:p text:style-name="P4"><text:span text:style-name="T9">Feature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1" draw:text-style-name="P5" draw:layer="layout" svg:width="22.859cm" svg:height="0.888cm" svg:x="1.016cm" svg:y="2.337cm">
          <text:p text:style-name="P4"><text:span text:style-name="T10">7 New Features Created from Raw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6" draw:layer="layout" svg:width="23.875cm" svg:height="1.32cm" svg:x="0.762cm" svg:y="3.4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0.228cm" svg:height="1.32cm" svg:x="0.762cm" svg:y="3.4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5" draw:layer="layout" svg:width="6.857cm" svg:height="0.609cm" svg:x="1.321cm" svg:y="3.531cm">
          <text:p text:style-name="P4"><text:span text:style-name="T14">Fare_per_K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5" draw:layer="layout" svg:width="12.699cm" svg:height="0.507cm" svg:x="1.321cm" svg:y="4.14cm">
          <text:p text:style-name="P4"><text:span text:style-name="T32">booking_value / ride_distance_k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14" draw:layer="layout" svg:width="7.111cm" svg:height="0.761cm" svg:x="17.272cm" svg:y="3.734cm">
          <text:p text:style-name="P13"><text:span text:style-name="T7">Price efficiency per k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8" draw:text-style-name="P6" draw:layer="layout" svg:width="23.875cm" svg:height="1.32cm" svg:x="0.762cm" svg:y="4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9" draw:text-style-name="P15" draw:layer="layout" svg:width="0.228cm" svg:height="1.32cm" svg:x="0.762cm" svg:y="4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5" draw:text-style-name="P5" draw:layer="layout" svg:width="6.857cm" svg:height="0.609cm" svg:x="1.321cm" svg:y="5.029cm">
          <text:p text:style-name="P4"><text:span text:style-name="T18">Fare_per_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6" draw:text-style-name="P5" draw:layer="layout" svg:width="12.699cm" svg:height="0.507cm" svg:x="1.321cm" svg:y="5.639cm">
          <text:p text:style-name="P4"><text:span text:style-name="T32">booking_value / actual_ride_time_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14" draw:layer="layout" svg:width="7.111cm" svg:height="0.761cm" svg:x="17.272cm" svg:y="5.232cm">
          <text:p text:style-name="P13"><text:span text:style-name="T7">Price efficiency per min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4" draw:text-style-name="P6" draw:layer="layout" svg:width="23.875cm" svg:height="1.32cm" svg:x="0.762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5" draw:text-style-name="P16" draw:layer="layout" svg:width="0.228cm" svg:height="1.32cm" svg:x="0.762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08" draw:text-style-name="P5" draw:layer="layout" svg:width="6.857cm" svg:height="0.609cm" svg:x="1.321cm" svg:y="6.528cm">
          <text:p text:style-name="P4"><text:span text:style-name="T19">Rush_Hour_Fl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09" draw:text-style-name="P5" draw:layer="layout" svg:width="12.699cm" svg:height="0.507cm" svg:x="1.321cm" svg:y="7.137cm">
          <text:p text:style-name="P4"><text:span text:style-name="T32">hour in {7,8,9,17,18,19,20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0" draw:text-style-name="P14" draw:layer="layout" svg:width="7.111cm" svg:height="0.761cm" svg:x="17.272cm" svg:y="6.731cm">
          <text:p text:style-name="P13"><text:span text:style-name="T7">Peak demand iden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0" draw:text-style-name="P6" draw:layer="layout" svg:width="23.875cm" svg:height="1.32cm" svg:x="0.762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1" draw:text-style-name="P17" draw:layer="layout" svg:width="0.228cm" svg:height="1.32cm" svg:x="0.762cm" svg:y="7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1" draw:text-style-name="P5" draw:layer="layout" svg:width="6.857cm" svg:height="0.609cm" svg:x="1.321cm" svg:y="8.026cm">
          <text:p text:style-name="P4"><text:span text:style-name="T20">Long_Distance_Fl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2" draw:text-style-name="P5" draw:layer="layout" svg:width="12.699cm" svg:height="0.507cm" svg:x="1.321cm" svg:y="8.636cm">
          <text:p text:style-name="P4"><text:span text:style-name="T32">distance &gt;= 75th perc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3" draw:text-style-name="P14" draw:layer="layout" svg:width="7.111cm" svg:height="0.761cm" svg:x="17.272cm" svg:y="8.23cm">
          <text:p text:style-name="P13"><text:span text:style-name="T7">Long trip catego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6" draw:text-style-name="P6" draw:layer="layout" svg:width="23.875cm" svg:height="1.32cm" svg:x="0.762cm" svg:y="9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7" draw:text-style-name="P18" draw:layer="layout" svg:width="0.228cm" svg:height="1.32cm" svg:x="0.762cm" svg:y="9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4" draw:text-style-name="P5" draw:layer="layout" svg:width="6.857cm" svg:height="0.609cm" svg:x="1.321cm" svg:y="9.525cm">
          <text:p text:style-name="P4"><text:span text:style-name="T21">City_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5" draw:text-style-name="P5" draw:layer="layout" svg:width="12.699cm" svg:height="0.507cm" svg:x="1.321cm" svg:y="10.135cm">
          <text:p text:style-name="P4"><text:span text:style-name="T32">pickup_location + '_' + drop_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6" draw:text-style-name="P14" draw:layer="layout" svg:width="7.111cm" svg:height="0.761cm" svg:x="17.272cm" svg:y="9.728cm">
          <text:p text:style-name="P13"><text:span text:style-name="T7">Route-level pattern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95" draw:text-style-name="P6" draw:layer="layout" svg:width="23.875cm" svg:height="1.32cm" svg:x="0.762cm" svg:y="10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17" draw:text-style-name="P21" draw:layer="layout" svg:width="0.228cm" svg:height="1.32cm" svg:x="0.762cm" svg:y="10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18" draw:text-style-name="P5" draw:layer="layout" svg:width="6.857cm" svg:height="0.609cm" svg:x="1.321cm" svg:y="11.024cm">
          <text:p text:style-name="P4"><text:span text:style-name="T33">Driver_Reliability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19" draw:text-style-name="P5" draw:layer="layout" svg:width="12.699cm" svg:height="0.507cm" svg:x="1.321cm" svg:y="11.633cm">
          <text:p text:style-name="P4"><text:span text:style-name="T32">acceptance x rating x 2 − delay x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20" draw:text-style-name="P14" draw:layer="layout" svg:width="7.111cm" svg:height="0.761cm" svg:x="17.272cm" svg:y="11.227cm">
          <text:p text:style-name="P13"><text:span text:style-name="T7">Driver quality scoring (0-1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21" draw:text-style-name="P6" draw:layer="layout" svg:width="23.875cm" svg:height="1.32cm" svg:x="0.762cm" svg:y="12.4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22" draw:text-style-name="P22" draw:layer="layout" svg:width="0.228cm" svg:height="1.32cm" svg:x="0.762cm" svg:y="12.4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23" draw:text-style-name="P5" draw:layer="layout" svg:width="6.857cm" svg:height="0.609cm" svg:x="1.321cm" svg:y="12.522cm">
          <text:p text:style-name="P4"><text:span text:style-name="T34">Customer_Loyalty_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24" draw:text-style-name="P5" draw:layer="layout" svg:width="12.699cm" svg:height="0.507cm" svg:x="1.321cm" svg:y="13.132cm">
          <text:p text:style-name="P4"><text:span text:style-name="T32">(1−cancel) x rating + log(booking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25" draw:text-style-name="P14" draw:layer="layout" svg:width="7.111cm" svg:height="0.761cm" svg:x="17.272cm" svg:y="12.725cm">
          <text:p text:style-name="P13"><text:span text:style-name="T7">Customer value scoring (0-1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6" draw:text-style-name="P5" draw:layer="layout" svg:width="22.859cm" svg:height="1.65cm" svg:x="1.016cm" svg:y="0.305cm">
          <text:p text:style-name="P4"><text:span text:style-name="T9">Machine Learning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11.429cm" svg:height="5.333cm" svg:x="0.762cm" svg:y="2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11.429cm" svg:height="1.574cm" svg:x="0.762cm" svg:y="2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11.429cm" svg:height="0.786cm" svg:x="0.762cm" svg:y="3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7" draw:text-style-name="P5" draw:layer="layout" svg:width="10.667cm" svg:height="1.167cm" svg:x="1.143cm" svg:y="2.743cm">
          <text:p text:style-name="P4"><text:span text:style-name="T35">01 <text:s/>Ride Outcome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8" draw:text-style-name="P5" draw:layer="layout" svg:width="10.667cm" svg:height="0.659cm" svg:x="1.143cm" svg:y="4.318cm">
          <text:p text:style-name="P4"><text:span text:style-name="T7">Type: Multi-Class 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9" draw:text-style-name="P5" draw:layer="layout" svg:width="10.667cm" svg:height="0.659cm" svg:x="1.143cm" svg:y="4.978cm">
          <text:p text:style-name="P4"><text:span text:style-name="T7">Algo: Random Fo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0" draw:text-style-name="P5" draw:layer="layout" svg:width="10.667cm" svg:height="0.659cm" svg:x="1.143cm" svg:y="5.588cm">
          <text:p text:style-name="P4"><text:span text:style-name="T7">Target: booking_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1" draw:text-style-name="P5" draw:layer="layout" svg:width="10.667cm" svg:height="1.269cm" svg:x="1.143cm" svg:y="6.299cm">
          <text:p text:style-name="P4"><text:span text:style-name="T32">Features: Completed . Cancelled . In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8" draw:text-style-name="P6" draw:layer="layout" svg:width="11.429cm" svg:height="5.333cm" svg:x="12.954cm" svg:y="2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9" draw:text-style-name="P15" draw:layer="layout" svg:width="11.429cm" svg:height="1.574cm" svg:x="12.954cm" svg:y="2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9" draw:text-style-name="P15" draw:layer="layout" svg:width="11.429cm" svg:height="0.786cm" svg:x="12.954cm" svg:y="3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2" draw:text-style-name="P5" draw:layer="layout" svg:width="10.667cm" svg:height="1.167cm" svg:x="13.335cm" svg:y="2.743cm">
          <text:p text:style-name="P4"><text:span text:style-name="T35">02 <text:s/>Fare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33" draw:text-style-name="P5" draw:layer="layout" svg:width="10.667cm" svg:height="0.659cm" svg:x="13.335cm" svg:y="4.318cm">
          <text:p text:style-name="P4"><text:span text:style-name="T7">Type: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4" draw:text-style-name="P5" draw:layer="layout" svg:width="10.667cm" svg:height="0.659cm" svg:x="13.335cm" svg:y="4.978cm">
          <text:p text:style-name="P4"><text:span text:style-name="T7">Algo: Gradient Boo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5" draw:text-style-name="P5" draw:layer="layout" svg:width="10.667cm" svg:height="0.659cm" svg:x="13.335cm" svg:y="5.588cm">
          <text:p text:style-name="P4"><text:span text:style-name="T7">Target: booking_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6" draw:text-style-name="P5" draw:layer="layout" svg:width="10.667cm" svg:height="1.269cm" svg:x="13.335cm" svg:y="6.299cm">
          <text:p text:style-name="P4"><text:span text:style-name="T32">Features: Distance . Traffic &amp; Weather . Time of Day . Su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4" draw:text-style-name="P6" draw:layer="layout" svg:width="11.429cm" svg:height="5.333cm" svg:x="0.762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" draw:text-style-name="P16" draw:layer="layout" svg:width="11.429cm" svg:height="1.574cm" svg:x="0.762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45" draw:text-style-name="P16" draw:layer="layout" svg:width="11.429cm" svg:height="0.786cm" svg:x="0.762cm" svg:y="9.1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37" draw:text-style-name="P5" draw:layer="layout" svg:width="10.667cm" svg:height="1.167cm" svg:x="1.143cm" svg:y="8.534cm">
          <text:p text:style-name="P4"><text:span text:style-name="T35">03 <text:s/>Customer Cancel R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8" draw:text-style-name="P5" draw:layer="layout" svg:width="10.667cm" svg:height="0.659cm" svg:x="1.143cm" svg:y="10.109cm">
          <text:p text:style-name="P4"><text:span text:style-name="T7">Type: Binary 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9" draw:text-style-name="P5" draw:layer="layout" svg:width="10.667cm" svg:height="0.659cm" svg:x="1.143cm" svg:y="10.77cm">
          <text:p text:style-name="P4"><text:span text:style-name="T7">Algo: Random Fo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0" draw:text-style-name="P5" draw:layer="layout" svg:width="10.667cm" svg:height="0.659cm" svg:x="1.143cm" svg:y="11.379cm">
          <text:p text:style-name="P4"><text:span text:style-name="T7">Target: customer_cancel_fl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41" draw:text-style-name="P5" draw:layer="layout" svg:width="10.667cm" svg:height="1.269cm" svg:x="1.143cm" svg:y="12.09cm">
          <text:p text:style-name="P4"><text:span text:style-name="T32">Features: Cancel Rate . Rating . Peak Behaviour . Pricing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50" draw:text-style-name="P6" draw:layer="layout" svg:width="11.429cm" svg:height="5.333cm" svg:x="12.954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51" draw:text-style-name="P17" draw:layer="layout" svg:width="11.429cm" svg:height="1.574cm" svg:x="12.954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51" draw:text-style-name="P17" draw:layer="layout" svg:width="11.429cm" svg:height="0.786cm" svg:x="12.954cm" svg:y="9.1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42" draw:text-style-name="P5" draw:layer="layout" svg:width="10.667cm" svg:height="1.167cm" svg:x="13.335cm" svg:y="8.534cm">
          <text:p text:style-name="P4"><text:span text:style-name="T35">04 <text:s/>Driver Delay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3" draw:text-style-name="P5" draw:layer="layout" svg:width="10.667cm" svg:height="0.659cm" svg:x="13.335cm" svg:y="10.109cm">
          <text:p text:style-name="P4"><text:span text:style-name="T7">Type: Binary 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44" draw:text-style-name="P5" draw:layer="layout" svg:width="10.667cm" svg:height="0.659cm" svg:x="13.335cm" svg:y="10.77cm">
          <text:p text:style-name="P4"><text:span text:style-name="T7">Algo: Random Fo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45" draw:text-style-name="P5" draw:layer="layout" svg:width="10.667cm" svg:height="0.659cm" svg:x="13.335cm" svg:y="11.379cm">
          <text:p text:style-name="P4"><text:span text:style-name="T7">Target: driver_delay_fl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46" draw:text-style-name="P5" draw:layer="layout" svg:width="10.667cm" svg:height="1.269cm" svg:x="13.335cm" svg:y="12.09cm">
          <text:p text:style-name="P4"><text:span text:style-name="T32">Features: Delay History . Traffic Exposure . Acceptance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6" presentation:class="page"/>
          <draw:frame draw:name="Notes Placeholder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7" draw:text-style-name="P5" draw:layer="layout" svg:width="22.859cm" svg:height="1.65cm" svg:x="1.016cm" svg:y="0.305cm">
          <text:p text:style-name="P4"><text:span text:style-name="T9">Model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5.333cm" svg:height="5.079cm" svg:x="0.762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8" draw:text-style-name="P8" draw:layer="layout" svg:width="5.333cm" svg:height="0.812cm" svg:x="0.762cm" svg:y="2.845cm">
          <text:p text:style-name="P7"><text:span text:style-name="T14">Ride Outc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9" draw:text-style-name="P8" draw:layer="layout" svg:width="5.333cm" svg:height="1.574cm" svg:x="0.762cm" svg:y="3.708cm">
          <text:p text:style-name="P7"><text:span text:style-name="T36">92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0" draw:text-style-name="P8" draw:layer="layout" svg:width="5.333cm" svg:height="0.71cm" svg:x="0.762cm" svg:y="5.283cm">
          <text:p text:style-name="P7"><text:span text:style-name="T12">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5" draw:text-style-name="P16" draw:layer="layout" svg:width="4.063cm" svg:height="0.71cm" svg:x="1.397cm" svg:y="6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1" draw:text-style-name="P8" draw:layer="layout" svg:width="4.063cm" svg:height="0.71cm" svg:x="1.397cm" svg:y="6.198cm">
          <text:p text:style-name="P7"><text:span text:style-name="T37">✓ </text:span><text:span text:style-name="T37">Target: 85-9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8" draw:text-style-name="P6" draw:layer="layout" svg:width="5.333cm" svg:height="5.079cm" svg:x="6.731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2" draw:text-style-name="P8" draw:layer="layout" svg:width="5.333cm" svg:height="0.812cm" svg:x="6.731cm" svg:y="2.845cm">
          <text:p text:style-name="P7"><text:span text:style-name="T18">Fare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3" draw:text-style-name="P8" draw:layer="layout" svg:width="5.333cm" svg:height="1.574cm" svg:x="6.731cm" svg:y="3.708cm">
          <text:p text:style-name="P7"><text:span text:style-name="T36">3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4" draw:text-style-name="P8" draw:layer="layout" svg:width="5.333cm" svg:height="0.71cm" svg:x="6.731cm" svg:y="5.283cm">
          <text:p text:style-name="P7"><text:span text:style-name="T12">RM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5" draw:text-style-name="P16" draw:layer="layout" svg:width="4.063cm" svg:height="0.71cm" svg:x="7.366cm" svg:y="6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5" draw:text-style-name="P8" draw:layer="layout" svg:width="4.063cm" svg:height="0.71cm" svg:x="7.366cm" svg:y="6.198cm">
          <text:p text:style-name="P7"><text:span text:style-name="T37">✓ </text:span><text:span text:style-name="T37">Target: ±1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4" draw:text-style-name="P6" draw:layer="layout" svg:width="5.333cm" svg:height="5.079cm" svg:x="12.7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6" draw:text-style-name="P8" draw:layer="layout" svg:width="5.333cm" svg:height="0.812cm" svg:x="12.7cm" svg:y="2.845cm">
          <text:p text:style-name="P7"><text:span text:style-name="T19">Cancel R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7" draw:text-style-name="P8" draw:layer="layout" svg:width="5.333cm" svg:height="1.574cm" svg:x="12.7cm" svg:y="3.708cm">
          <text:p text:style-name="P7"><text:span text:style-name="T36">1.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58" draw:text-style-name="P8" draw:layer="layout" svg:width="5.333cm" svg:height="0.71cm" svg:x="12.7cm" svg:y="5.283cm">
          <text:p text:style-name="P7"><text:span text:style-name="T12">AUC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5" draw:text-style-name="P16" draw:layer="layout" svg:width="4.063cm" svg:height="0.71cm" svg:x="13.335cm" svg:y="6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9" draw:text-style-name="P8" draw:layer="layout" svg:width="4.063cm" svg:height="0.71cm" svg:x="13.335cm" svg:y="6.198cm">
          <text:p text:style-name="P7"><text:span text:style-name="T37">✓ </text:span><text:span text:style-name="T37">Target: &gt;0.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0" draw:text-style-name="P6" draw:layer="layout" svg:width="5.333cm" svg:height="5.079cm" svg:x="18.66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60" draw:text-style-name="P8" draw:layer="layout" svg:width="5.333cm" svg:height="0.812cm" svg:x="18.669cm" svg:y="2.845cm">
          <text:p text:style-name="P7"><text:span text:style-name="T20">Driver D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61" draw:text-style-name="P8" draw:layer="layout" svg:width="5.333cm" svg:height="1.574cm" svg:x="18.669cm" svg:y="3.708cm">
          <text:p text:style-name="P7"><text:span text:style-name="T36">1.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62" draw:text-style-name="P8" draw:layer="layout" svg:width="5.333cm" svg:height="0.71cm" svg:x="18.669cm" svg:y="5.283cm">
          <text:p text:style-name="P7"><text:span text:style-name="T12">AUC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5" draw:text-style-name="P16" draw:layer="layout" svg:width="4.063cm" svg:height="0.71cm" svg:x="19.304cm" svg:y="6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63" draw:text-style-name="P8" draw:layer="layout" svg:width="4.063cm" svg:height="0.71cm" svg:x="19.304cm" svg:y="6.198cm">
          <text:p text:style-name="P7"><text:span text:style-name="T37">✓ </text:span><text:span text:style-name="T37">Target: &gt;0.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64" draw:text-style-name="P5" draw:layer="layout" svg:width="23.875cm" svg:height="0.888cm" svg:x="0.762cm" svg:y="7.925cm">
          <text:p text:style-name="P4"><text:span text:style-name="T25">Evaluation Metrics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0" draw:text-style-name="P6" draw:layer="layout" svg:width="23.875cm" svg:height="1.726cm" svg:x="0.762cm" svg:y="8.9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65" draw:text-style-name="P5" draw:layer="layout" svg:width="5.587cm" svg:height="1.269cm" svg:x="1.27cm" svg:y="9.246cm">
          <text:p text:style-name="P4"><text:span text:style-name="T38">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66" draw:text-style-name="P5" draw:layer="layout" svg:width="17.017cm" svg:height="1.269cm" svg:x="7.239cm" svg:y="9.246cm">
          <text:p text:style-name="P4"><text:span text:style-name="T4">Accuracy <text:s/>. <text:s/>F1-Score <text:s/>. <text:s/>AUC <text:s/>. <text:s/>Confusion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" draw:text-style-name="P6" draw:layer="layout" svg:width="23.875cm" svg:height="1.726cm" svg:x="0.762cm" svg:y="11.0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67" draw:text-style-name="P5" draw:layer="layout" svg:width="5.587cm" svg:height="1.269cm" svg:x="1.27cm" svg:y="11.328cm">
          <text:p text:style-name="P4"><text:span text:style-name="T38">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68" draw:text-style-name="P5" draw:layer="layout" svg:width="17.017cm" svg:height="1.269cm" svg:x="7.239cm" svg:y="11.328cm">
          <text:p text:style-name="P4"><text:span text:style-name="T4">RMSE <text:s/>. <text:s/>MAE <text:s/>. <text:s/>R2 <text:s/>. <text:s/>%RMSE of Mean F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7" presentation:class="page"/>
          <draw:frame draw:name="Notes Placeholder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9" draw:text-style-name="P5" draw:layer="layout" svg:width="22.859cm" svg:height="1.65cm" svg:x="1.016cm" svg:y="0.305cm">
          <text:p text:style-name="P4"><text:span text:style-name="T9">Exploratory Data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5.587cm" svg:height="3.352cm" svg:x="0.635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0" draw:text-style-name="P8" draw:layer="layout" svg:width="5.587cm" svg:height="0.964cm" svg:x="0.635cm" svg:y="2.921cm">
          <text:p text:style-name="P7"><text:span text:style-name="T39">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71" draw:text-style-name="P8" draw:layer="layout" svg:width="5.206cm" svg:height="0.913cm" svg:x="0.838cm" svg:y="3.937cm">
          <text:p text:style-name="P7"><text:span text:style-name="T40">Ride Volume by H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72" draw:text-style-name="P8" draw:layer="layout" svg:width="5.206cm" svg:height="0.913cm" svg:x="0.838cm" svg:y="4.902cm">
          <text:p text:style-name="P7"><text:span text:style-name="T41">Peak hours: 7-9 AM &amp; 5-8 PM r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6" draw:layer="layout" svg:width="5.587cm" svg:height="3.352cm" svg:x="6.731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3" draw:text-style-name="P8" draw:layer="layout" svg:width="5.587cm" svg:height="0.964cm" svg:x="6.731cm" svg:y="2.921cm">
          <text:p text:style-name="P7"><text:span text:style-name="T39">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4" draw:text-style-name="P8" draw:layer="layout" svg:width="5.206cm" svg:height="0.913cm" svg:x="6.934cm" svg:y="3.937cm">
          <text:p text:style-name="P7"><text:span text:style-name="T40">Ride Volume by Week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5" draw:text-style-name="P8" draw:layer="layout" svg:width="5.206cm" svg:height="0.913cm" svg:x="6.934cm" svg:y="4.902cm">
          <text:p text:style-name="P7"><text:span text:style-name="T41">Weekdays higher; Saturday d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6" draw:layer="layout" svg:width="5.587cm" svg:height="3.352cm" svg:x="12.827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76" draw:text-style-name="P8" draw:layer="layout" svg:width="5.587cm" svg:height="0.964cm" svg:x="12.827cm" svg:y="2.921cm">
          <text:p text:style-name="P7"><text:span text:style-name="T39">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7" draw:text-style-name="P8" draw:layer="layout" svg:width="5.206cm" svg:height="0.913cm" svg:x="13.03cm" svg:y="3.937cm">
          <text:p text:style-name="P7"><text:span text:style-name="T40">Ride Volume by 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8" draw:text-style-name="P8" draw:layer="layout" svg:width="5.206cm" svg:height="0.913cm" svg:x="13.03cm" svg:y="4.902cm">
          <text:p text:style-name="P7"><text:span text:style-name="T41">Mumbai &amp; Delhi lead book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" draw:text-style-name="P6" draw:layer="layout" svg:width="5.587cm" svg:height="3.352cm" svg:x="18.923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9" draw:text-style-name="P8" draw:layer="layout" svg:width="5.587cm" svg:height="0.964cm" svg:x="18.923cm" svg:y="2.921cm">
          <text:p text:style-name="P7"><text:span text:style-name="T39">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80" draw:text-style-name="P8" draw:layer="layout" svg:width="5.206cm" svg:height="0.913cm" svg:x="19.126cm" svg:y="3.937cm">
          <text:p text:style-name="P7"><text:span text:style-name="T40">Cancellation Heat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81" draw:text-style-name="P8" draw:layer="layout" svg:width="5.206cm" svg:height="0.913cm" svg:x="19.126cm" svg:y="4.902cm">
          <text:p text:style-name="P7"><text:span text:style-name="T41">City x Hour matrix - morning pea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" draw:text-style-name="P6" draw:layer="layout" svg:width="5.587cm" svg:height="3.352cm" svg:x="0.635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82" draw:text-style-name="P8" draw:layer="layout" svg:width="5.587cm" svg:height="0.964cm" svg:x="0.635cm" svg:y="6.782cm">
          <text:p text:style-name="P7"><text:span text:style-name="T39">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83" draw:text-style-name="P8" draw:layer="layout" svg:width="5.206cm" svg:height="0.913cm" svg:x="0.838cm" svg:y="7.798cm">
          <text:p text:style-name="P7"><text:span text:style-name="T40">Distance vs F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84" draw:text-style-name="P8" draw:layer="layout" svg:width="5.206cm" svg:height="0.913cm" svg:x="0.838cm" svg:y="8.763cm">
          <text:p text:style-name="P7"><text:span text:style-name="T41">Strong positive corre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0" draw:text-style-name="P6" draw:layer="layout" svg:width="5.587cm" svg:height="3.352cm" svg:x="6.731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5" draw:text-style-name="P8" draw:layer="layout" svg:width="5.587cm" svg:height="0.964cm" svg:x="6.731cm" svg:y="6.782cm">
          <text:p text:style-name="P7"><text:span text:style-name="T39">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6" draw:text-style-name="P8" draw:layer="layout" svg:width="5.206cm" svg:height="0.913cm" svg:x="6.934cm" svg:y="7.798cm">
          <text:p text:style-name="P7"><text:span text:style-name="T40">Rating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87" draw:text-style-name="P8" draw:layer="layout" svg:width="5.206cm" svg:height="0.913cm" svg:x="6.934cm" svg:y="8.763cm">
          <text:p text:style-name="P7"><text:span text:style-name="T41">Customer vs Driver rating 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0" draw:text-style-name="P6" draw:layer="layout" svg:width="5.587cm" svg:height="3.352cm" svg:x="12.827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88" draw:text-style-name="P8" draw:layer="layout" svg:width="5.587cm" svg:height="0.964cm" svg:x="12.827cm" svg:y="6.782cm">
          <text:p text:style-name="P7"><text:span text:style-name="T39">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89" draw:text-style-name="P8" draw:layer="layout" svg:width="5.206cm" svg:height="0.913cm" svg:x="13.03cm" svg:y="7.798cm">
          <text:p text:style-name="P7"><text:span text:style-name="T40">Traffic/Weather I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90" draw:text-style-name="P8" draw:layer="layout" svg:width="5.206cm" svg:height="0.913cm" svg:x="13.03cm" svg:y="8.763cm">
          <text:p text:style-name="P7"><text:span text:style-name="T41">Heavy Rain + High Traffic -&gt; 40% canc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" draw:text-style-name="P6" draw:layer="layout" svg:width="5.587cm" svg:height="3.352cm" svg:x="18.923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91" draw:text-style-name="P8" draw:layer="layout" svg:width="5.587cm" svg:height="0.964cm" svg:x="18.923cm" svg:y="6.782cm">
          <text:p text:style-name="P7"><text:span text:style-name="T39">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92" draw:text-style-name="P8" draw:layer="layout" svg:width="5.206cm" svg:height="0.913cm" svg:x="19.126cm" svg:y="7.798cm">
          <text:p text:style-name="P7"><text:span text:style-name="T40">Surge Behavior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93" draw:text-style-name="P8" draw:layer="layout" svg:width="5.206cm" svg:height="0.913cm" svg:x="19.126cm" svg:y="8.763cm">
          <text:p text:style-name="P7"><text:span text:style-name="T41">City-wise surge multiplier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0" draw:text-style-name="P6" draw:layer="layout" svg:width="5.587cm" svg:height="3.352cm" svg:x="0.635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94" draw:text-style-name="P8" draw:layer="layout" svg:width="5.587cm" svg:height="0.964cm" svg:x="0.635cm" svg:y="10.643cm">
          <text:p text:style-name="P7"><text:span text:style-name="T39">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95" draw:text-style-name="P8" draw:layer="layout" svg:width="5.206cm" svg:height="0.913cm" svg:x="0.838cm" svg:y="11.659cm">
          <text:p text:style-name="P7"><text:span text:style-name="T40">Cancellations by H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96" draw:text-style-name="P8" draw:layer="layout" svg:width="5.206cm" svg:height="0.913cm" svg:x="0.838cm" svg:y="12.624cm">
          <text:p text:style-name="P7"><text:span text:style-name="T41">10 AM and 6-8 PM peak cancel 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0" draw:text-style-name="P6" draw:layer="layout" svg:width="5.587cm" svg:height="3.352cm" svg:x="6.731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97" draw:text-style-name="P8" draw:layer="layout" svg:width="5.587cm" svg:height="0.964cm" svg:x="6.731cm" svg:y="10.643cm">
          <text:p text:style-name="P7"><text:span text:style-name="T39">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8" draw:text-style-name="P8" draw:layer="layout" svg:width="5.206cm" svg:height="0.913cm" svg:x="6.934cm" svg:y="11.659cm">
          <text:p text:style-name="P7"><text:span text:style-name="T40">Vehicle Type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99" draw:text-style-name="P8" draw:layer="layout" svg:width="5.206cm" svg:height="0.913cm" svg:x="6.934cm" svg:y="12.624cm">
          <text:p text:style-name="P7"><text:span text:style-name="T41">Bike &gt; Auto &gt; Cab 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0" draw:text-style-name="P6" draw:layer="layout" svg:width="5.587cm" svg:height="3.352cm" svg:x="12.827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00" draw:text-style-name="P8" draw:layer="layout" svg:width="5.587cm" svg:height="0.964cm" svg:x="12.827cm" svg:y="10.643cm">
          <text:p text:style-name="P7"><text:span text:style-name="T39">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01" draw:text-style-name="P8" draw:layer="layout" svg:width="5.206cm" svg:height="0.913cm" svg:x="13.03cm" svg:y="11.659cm">
          <text:p text:style-name="P7"><text:span text:style-name="T40">Demand Heat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02" draw:text-style-name="P8" draw:layer="layout" svg:width="5.206cm" svg:height="0.913cm" svg:x="13.03cm" svg:y="12.624cm">
          <text:p text:style-name="P7"><text:span text:style-name="T41">Location x Hour demand inten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0" draw:text-style-name="P6" draw:layer="layout" svg:width="5.587cm" svg:height="3.352cm" svg:x="18.923cm" svg:y="10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03" draw:text-style-name="P8" draw:layer="layout" svg:width="5.587cm" svg:height="0.964cm" svg:x="18.923cm" svg:y="10.643cm">
          <text:p text:style-name="P7"><text:span text:style-name="T39">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4" draw:text-style-name="P8" draw:layer="layout" svg:width="5.206cm" svg:height="0.913cm" svg:x="19.126cm" svg:y="11.659cm">
          <text:p text:style-name="P7"><text:span text:style-name="T40">Feature Impor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05" draw:text-style-name="P8" draw:layer="layout" svg:width="5.206cm" svg:height="0.913cm" svg:x="19.126cm" svg:y="12.624cm">
          <text:p text:style-name="P7"><text:span text:style-name="T41">Top drivers of each ML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8" presentation:class="page"/>
          <draw:frame draw:name="Notes Placeholder 2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6" draw:text-style-name="P5" draw:layer="layout" svg:width="22.859cm" svg:height="1.65cm" svg:x="1.016cm" svg:y="0.305cm">
          <text:p text:style-name="P4"><text:span text:style-name="T9">SQL Data Management -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7" draw:text-style-name="P5" draw:layer="layout" svg:width="11.429cm" svg:height="0.888cm" svg:x="0.762cm" svg:y="2.54cm">
          <text:p text:style-name="P4"><text:span text:style-name="T11">5 Normalized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6" draw:layer="layout" svg:width="11.175cm" svg:height="1.32cm" svg:x="0.762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0.202cm" svg:height="1.32cm" svg:x="0.762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08" draw:text-style-name="P5" draw:layer="layout" svg:width="7.111cm" svg:height="0.71cm" svg:x="1.321cm" svg:y="3.912cm">
          <text:p text:style-name="P4"><text:span text:style-name="T38">book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9" draw:text-style-name="P14" draw:layer="layout" svg:width="3.301cm" svg:height="0.71cm" svg:x="8.382cm" svg:y="3.912cm">
          <text:p text:style-name="P13"><text:span text:style-name="T12">100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8" draw:text-style-name="P6" draw:layer="layout" svg:width="11.175cm" svg:height="1.32cm" svg:x="0.762cm" svg:y="5.1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9" draw:text-style-name="P15" draw:layer="layout" svg:width="0.202cm" svg:height="1.32cm" svg:x="0.762cm" svg:y="5.1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0" draw:text-style-name="P5" draw:layer="layout" svg:width="7.111cm" svg:height="0.71cm" svg:x="1.321cm" svg:y="5.486cm">
          <text:p text:style-name="P4"><text:span text:style-name="T42">custo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1" draw:text-style-name="P14" draw:layer="layout" svg:width="3.301cm" svg:height="0.71cm" svg:x="8.382cm" svg:y="5.486cm">
          <text:p text:style-name="P13"><text:span text:style-name="T12">10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4" draw:text-style-name="P6" draw:layer="layout" svg:width="11.175cm" svg:height="1.32cm" svg:x="0.762cm" svg:y="6.7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5" draw:text-style-name="P16" draw:layer="layout" svg:width="0.202cm" svg:height="1.32cm" svg:x="0.762cm" svg:y="6.7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12" draw:text-style-name="P5" draw:layer="layout" svg:width="7.111cm" svg:height="0.71cm" svg:x="1.321cm" svg:y="7.061cm">
          <text:p text:style-name="P4"><text:span text:style-name="T43">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13" draw:text-style-name="P14" draw:layer="layout" svg:width="3.301cm" svg:height="0.71cm" svg:x="8.382cm" svg:y="7.061cm">
          <text:p text:style-name="P13"><text:span text:style-name="T12">5,00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0" draw:text-style-name="P6" draw:layer="layout" svg:width="11.175cm" svg:height="1.32cm" svg:x="0.762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51" draw:text-style-name="P17" draw:layer="layout" svg:width="0.202cm" svg:height="1.32cm" svg:x="0.762cm" svg:y="8.3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14" draw:text-style-name="P5" draw:layer="layout" svg:width="7.111cm" svg:height="0.71cm" svg:x="1.321cm" svg:y="8.636cm">
          <text:p text:style-name="P4"><text:span text:style-name="T44">location_de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15" draw:text-style-name="P14" draw:layer="layout" svg:width="3.301cm" svg:height="0.71cm" svg:x="8.382cm" svg:y="8.636cm">
          <text:p text:style-name="P13"><text:span text:style-name="T12">17,941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6" draw:text-style-name="P6" draw:layer="layout" svg:width="11.175cm" svg:height="1.32cm" svg:x="0.762cm" svg:y="9.9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7" draw:text-style-name="P18" draw:layer="layout" svg:width="0.202cm" svg:height="1.32cm" svg:x="0.762cm" svg:y="9.9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16" draw:text-style-name="P5" draw:layer="layout" svg:width="7.111cm" svg:height="0.71cm" svg:x="1.321cm" svg:y="10.211cm">
          <text:p text:style-name="P4"><text:span text:style-name="T45">time_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17" draw:text-style-name="P14" draw:layer="layout" svg:width="3.301cm" svg:height="0.71cm" svg:x="8.382cm" svg:y="10.211cm">
          <text:p text:style-name="P13"><text:span text:style-name="T12">8,760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18" draw:text-style-name="P5" draw:layer="layout" svg:width="11.683cm" svg:height="0.888cm" svg:x="12.954cm" svg:y="2.54cm">
          <text:p text:style-name="P4"><text:span text:style-name="T11">8 Analytical 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19" draw:text-style-name="P6" draw:layer="layout" svg:width="11.683cm" svg:height="1.066cm" svg:x="12.954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20" draw:text-style-name="P5" draw:layer="layout" svg:width="10.921cm" svg:height="0.71cm" svg:x="13.335cm" svg:y="3.785cm">
          <text:p text:style-name="P4"><text:span text:style-name="T26">▸ <text:s/></text:span><text:span text:style-name="T26">Booking Summary KP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19" draw:text-style-name="P6" draw:layer="layout" svg:width="11.683cm" svg:height="1.066cm" svg:x="12.954cm" svg:y="4.9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21" draw:text-style-name="P5" draw:layer="layout" svg:width="10.921cm" svg:height="0.71cm" svg:x="13.335cm" svg:y="5.093cm">
          <text:p text:style-name="P4"><text:span text:style-name="T26">▸ <text:s/></text:span><text:span text:style-name="T26">Cancellation Rate by 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19" draw:text-style-name="P6" draw:layer="layout" svg:width="11.683cm" svg:height="1.066cm" svg:x="12.954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22" draw:text-style-name="P5" draw:layer="layout" svg:width="10.921cm" svg:height="0.71cm" svg:x="13.335cm" svg:y="6.401cm">
          <text:p text:style-name="P4"><text:span text:style-name="T26">▸ <text:s/></text:span><text:span text:style-name="T26">Fare by Vehic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19" draw:text-style-name="P6" draw:layer="layout" svg:width="11.683cm" svg:height="1.066cm" svg:x="12.954cm" svg:y="7.5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23" draw:text-style-name="P5" draw:layer="layout" svg:width="10.921cm" svg:height="0.71cm" svg:x="13.335cm" svg:y="7.709cm">
          <text:p text:style-name="P4"><text:span text:style-name="T26">▸ <text:s/></text:span><text:span text:style-name="T26">Peak Cancellation 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19" draw:text-style-name="P6" draw:layer="layout" svg:width="11.683cm" svg:height="1.066cm" svg:x="12.954cm" svg:y="8.8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24" draw:text-style-name="P5" draw:layer="layout" svg:width="10.921cm" svg:height="0.71cm" svg:x="13.335cm" svg:y="9.017cm">
          <text:p text:style-name="P4"><text:span text:style-name="T26">▸ <text:s/></text:span><text:span text:style-name="T26">High-Risk Custo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219" draw:text-style-name="P6" draw:layer="layout" svg:width="11.683cm" svg:height="1.066cm" svg:x="12.954cm" svg:y="10.1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25" draw:text-style-name="P5" draw:layer="layout" svg:width="10.921cm" svg:height="0.71cm" svg:x="13.335cm" svg:y="10.325cm">
          <text:p text:style-name="P4"><text:span text:style-name="T26">▸ <text:s/></text:span><text:span text:style-name="T26">Driver Reliability Rank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219" draw:text-style-name="P6" draw:layer="layout" svg:width="11.683cm" svg:height="1.066cm" svg:x="12.954cm" svg:y="11.4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26" draw:text-style-name="P5" draw:layer="layout" svg:width="10.921cm" svg:height="0.71cm" svg:x="13.335cm" svg:y="11.633cm">
          <text:p text:style-name="P4"><text:span text:style-name="T26">▸ <text:s/></text:span><text:span text:style-name="T26">Surge &amp; Demand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19" draw:text-style-name="P6" draw:layer="layout" svg:width="11.683cm" svg:height="1.066cm" svg:x="12.954cm" svg:y="12.7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27" draw:text-style-name="P5" draw:layer="layout" svg:width="10.921cm" svg:height="0.71cm" svg:x="13.335cm" svg:y="12.941cm">
          <text:p text:style-name="P4"><text:span text:style-name="T26">▸ <text:s/></text:span><text:span text:style-name="T26">Traffic &amp; Weather I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0" draw:text-style-name="P6" draw:layer="layout" svg:width="23.875cm" svg:height="0.812cm" svg:x="0.762cm" svg:y="13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28" draw:text-style-name="P8" draw:layer="layout" svg:width="23.875cm" svg:height="0.812cm" svg:x="0.762cm" svg:y="13.157cm">
          <text:p text:style-name="P7"><text:span text:style-name="T46">Connection: localhost:3306 <text:s/>. <text:s/>user: root <text:s/>. <text:s/>database: rapido_db <text:s/>. <text:s/>14 Indexes for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9" presentation:class="page"/>
          <draw:frame draw:name="Notes Placeholder 2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9" draw:text-style-name="P5" draw:layer="layout" svg:width="22.859cm" svg:height="1.65cm" svg:x="1.016cm" svg:y="0.305cm">
          <text:p text:style-name="P4"><text:span text:style-name="T9">Streamlit Dashboard - Ste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11.556cm" svg:height="3.25cm" svg:x="0.762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11.556cm" svg:height="1.117cm" svg:x="0.762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11.556cm" svg:height="0.558cm" svg:x="0.762cm" svg:y="3.2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0" draw:text-style-name="P5" draw:layer="layout" svg:width="10.667cm" svg:height="0.761cm" svg:x="1.143cm" svg:y="2.845cm">
          <text:p text:style-name="P4"><text:span text:style-name="T24">Tab 1 <text:s/>. <text:s/>Overview &amp; E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1" draw:text-style-name="P5" draw:layer="layout" svg:width="10.794cm" svg:height="1.65cm" svg:x="1.143cm" svg:y="3.988cm">
          <text:p text:style-name="P4"><text:span text:style-name="T26">KPI cards . 13 interactive charts . City/Vehicle/Date 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8" draw:text-style-name="P6" draw:layer="layout" svg:width="11.556cm" svg:height="3.25cm" svg:x="13.081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9" draw:text-style-name="P15" draw:layer="layout" svg:width="11.556cm" svg:height="1.117cm" svg:x="13.081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9" draw:text-style-name="P15" draw:layer="layout" svg:width="11.556cm" svg:height="0.558cm" svg:x="13.081cm" svg:y="3.2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2" draw:text-style-name="P5" draw:layer="layout" svg:width="10.667cm" svg:height="0.761cm" svg:x="13.462cm" svg:y="2.845cm">
          <text:p text:style-name="P4"><text:span text:style-name="T24">Tab 2 <text:s/>. <text:s/>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3" draw:text-style-name="P5" draw:layer="layout" svg:width="10.794cm" svg:height="1.65cm" svg:x="13.462cm" svg:y="3.988cm">
          <text:p text:style-name="P4"><text:span text:style-name="T26">Live inference for all 4 models . Gauge charts . Probability b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4" draw:text-style-name="P6" draw:layer="layout" svg:width="11.556cm" svg:height="3.25cm" svg:x="0.762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5" draw:text-style-name="P16" draw:layer="layout" svg:width="11.556cm" svg:height="1.117cm" svg:x="0.762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5" draw:text-style-name="P16" draw:layer="layout" svg:width="11.556cm" svg:height="0.558cm" svg:x="0.762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34" draw:text-style-name="P5" draw:layer="layout" svg:width="10.667cm" svg:height="0.761cm" svg:x="1.143cm" svg:y="6.604cm">
          <text:p text:style-name="P4"><text:span text:style-name="T24">Tab 3 <text:s/>. <text:s/>Demand &amp; Lo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35" draw:text-style-name="P5" draw:layer="layout" svg:width="10.794cm" svg:height="1.65cm" svg:x="1.143cm" svg:y="7.747cm">
          <text:p text:style-name="P4"><text:span text:style-name="T26">Demand heatmaps . Surge patterns . Temporal featur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0" draw:text-style-name="P6" draw:layer="layout" svg:width="11.556cm" svg:height="3.25cm" svg:x="13.081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1" draw:text-style-name="P17" draw:layer="layout" svg:width="11.556cm" svg:height="1.117cm" svg:x="13.081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1" draw:text-style-name="P17" draw:layer="layout" svg:width="11.556cm" svg:height="0.558cm" svg:x="13.081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36" draw:text-style-name="P5" draw:layer="layout" svg:width="10.667cm" svg:height="0.761cm" svg:x="13.462cm" svg:y="6.604cm">
          <text:p text:style-name="P4"><text:span text:style-name="T24">Tab 4 <text:s/>. <text:s/>Model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37" draw:text-style-name="P5" draw:layer="layout" svg:width="10.794cm" svg:height="1.65cm" svg:x="13.462cm" svg:y="7.747cm">
          <text:p text:style-name="P4"><text:span text:style-name="T26">Feature importance charts . Algorithm summary . 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56" draw:text-style-name="P6" draw:layer="layout" svg:width="11.556cm" svg:height="3.25cm" svg:x="0.762cm" svg:y="10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7" draw:text-style-name="P18" draw:layer="layout" svg:width="11.556cm" svg:height="1.117cm" svg:x="0.762cm" svg:y="10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7" draw:text-style-name="P18" draw:layer="layout" svg:width="11.556cm" svg:height="0.558cm" svg:x="0.762cm" svg:y="10.7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38" draw:text-style-name="P5" draw:layer="layout" svg:width="10.667cm" svg:height="0.761cm" svg:x="1.143cm" svg:y="10.363cm">
          <text:p text:style-name="P4"><text:span text:style-name="T24">Tab 5 <text:s/>. <text:s/>SQL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39" draw:text-style-name="P5" draw:layer="layout" svg:width="10.794cm" svg:height="1.65cm" svg:x="1.143cm" svg:y="11.506cm">
          <text:p text:style-name="P4"><text:span text:style-name="T26">MySQL live queries . 8 preset queries . Custom SQL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95" draw:text-style-name="P6" draw:layer="layout" svg:width="11.556cm" svg:height="3.25cm" svg:x="13.081cm" svg:y="10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17" draw:text-style-name="P21" draw:layer="layout" svg:width="11.556cm" svg:height="1.117cm" svg:x="13.081cm" svg:y="10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17" draw:text-style-name="P21" draw:layer="layout" svg:width="11.556cm" svg:height="0.558cm" svg:x="13.081cm" svg:y="10.7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40" draw:text-style-name="P5" draw:layer="layout" svg:width="10.667cm" svg:height="0.761cm" svg:x="13.462cm" svg:y="10.363cm">
          <text:p text:style-name="P4"><text:span text:style-name="T24">Tab 6 <text:s/>. <text:s/>Data Explo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41" draw:text-style-name="P5" draw:layer="layout" svg:width="10.794cm" svg:height="1.65cm" svg:x="13.462cm" svg:y="11.506cm">
          <text:p text:style-name="P4"><text:span text:style-name="T26">Browse all 7 datasets . Filter . Statistical summary . Down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42" draw:text-style-name="P23" draw:layer="layout" svg:width="23.875cm" svg:height="0.812cm" svg:x="0.762cm" svg:y="13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43" draw:text-style-name="P8" draw:layer="layout" svg:width="23.875cm" svg:height="0.812cm" svg:x="0.762cm" svg:y="13.157cm">
          <text:p text:style-name="P7"><text:span text:style-name="T47">$ streamlit run app/streamlit_app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0" presentation:class="page"/>
          <draw:frame draw:name="Notes Placeholder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44" draw:text-style-name="P5" draw:layer="layout" svg:width="22.859cm" svg:height="1.65cm" svg:x="1.016cm" svg:y="0.305cm">
          <text:p text:style-name="P4"><text:span text:style-name="T9">Business Use Cases &amp; Expecte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6" draw:layer="layout" svg:width="23.875cm" svg:height="2.412cm" svg:x="0.762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5" draw:text-style-name="P2" draw:layer="layout" svg:width="1.396cm" svg:height="1.396cm" svg:x="1.067cm" svg:y="3.17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245" draw:text-style-name="P8" draw:layer="layout" svg:width="1.396cm" svg:height="1.396cm" svg:x="1.067cm" svg:y="3.175cm">
          <text:p text:style-name="P7"><text:span text:style-name="T48">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6" draw:text-style-name="P5" draw:layer="layout" svg:width="21.335cm" svg:height="0.812cm" svg:x="2.794cm" svg:y="2.87cm">
          <text:p text:style-name="P4"><text:span text:style-name="T25">Use Case 1 <text:s/>- <text:s/>Reduce Cancellations by 2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7" draw:text-style-name="P5" draw:layer="layout" svg:width="21.335cm" svg:height="1.142cm" svg:x="2.794cm" svg:y="3.785cm">
          <text:p text:style-name="P4"><text:span text:style-name="T12">Customer cancel risk model flags high-risk bookings before confirmation - enable targeted interven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8" draw:text-style-name="P6" draw:layer="layout" svg:width="23.875cm" svg:height="2.412cm" svg:x="0.762cm" svg:y="5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9" draw:text-style-name="P15" draw:layer="layout" svg:width="1.396cm" svg:height="1.396cm" svg:x="1.067cm" svg:y="5.9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248" draw:text-style-name="P8" draw:layer="layout" svg:width="1.396cm" svg:height="1.396cm" svg:x="1.067cm" svg:y="5.969cm">
          <text:p text:style-name="P7"><text:span text:style-name="T48">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9" draw:text-style-name="P5" draw:layer="layout" svg:width="21.335cm" svg:height="0.812cm" svg:x="2.794cm" svg:y="5.664cm">
          <text:p text:style-name="P4"><text:span text:style-name="T27">Use Case 2 <text:s/>- <text:s/>Improve ETA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0" draw:text-style-name="P5" draw:layer="layout" svg:width="21.335cm" svg:height="1.142cm" svg:x="2.794cm" svg:y="6.579cm">
          <text:p text:style-name="P4"><text:span text:style-name="T12">Driver delay prediction identifies unreliable drivers early - improve dispatch deci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4" draw:text-style-name="P6" draw:layer="layout" svg:width="23.875cm" svg:height="2.412cm" svg:x="0.762cm" svg:y="8.2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3" draw:text-style-name="P16" draw:layer="layout" svg:width="1.396cm" svg:height="1.396cm" svg:x="1.067cm" svg:y="8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251" draw:text-style-name="P8" draw:layer="layout" svg:width="1.396cm" svg:height="1.396cm" svg:x="1.067cm" svg:y="8.763cm">
          <text:p text:style-name="P7"><text:span text:style-name="T48">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52" draw:text-style-name="P5" draw:layer="layout" svg:width="21.335cm" svg:height="0.812cm" svg:x="2.794cm" svg:y="8.458cm">
          <text:p text:style-name="P4"><text:span text:style-name="T28">Use Case 3 <text:s/>- <text:s/>Dynamic Pri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53" draw:text-style-name="P5" draw:layer="layout" svg:width="21.335cm" svg:height="1.142cm" svg:x="2.794cm" svg:y="9.373cm">
          <text:p text:style-name="P4"><text:span text:style-name="T12">Demand patterns + surge analysis enable intelligent fare adjustments by location and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0" draw:text-style-name="P6" draw:layer="layout" svg:width="23.875cm" svg:height="2.412cm" svg:x="0.762cm" svg:y="11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7" draw:text-style-name="P17" draw:layer="layout" svg:width="1.396cm" svg:height="1.396cm" svg:x="1.067cm" svg:y="11.5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254" draw:text-style-name="P8" draw:layer="layout" svg:width="1.396cm" svg:height="1.396cm" svg:x="1.067cm" svg:y="11.557cm">
          <text:p text:style-name="P7"><text:span text:style-name="T48">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55" draw:text-style-name="P5" draw:layer="layout" svg:width="21.335cm" svg:height="0.812cm" svg:x="2.794cm" svg:y="11.252cm">
          <text:p text:style-name="P4"><text:span text:style-name="T29">Use Case 4 <text:s/>- <text:s/>Driver Reliability Sc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56" draw:text-style-name="P5" draw:layer="layout" svg:width="21.335cm" svg:height="1.142cm" svg:x="2.794cm" svg:y="12.167cm">
          <text:p text:style-name="P4"><text:span text:style-name="T12">Composite reliability score (0-10) guides driver allocation and incentive 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1" presentation:class="page"/>
          <draw:frame draw:name="Notes Placeholder 2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" draw:text-style-name="P12" draw:layer="layout" svg:width="25.399cm" svg:height="2.2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7" draw:text-style-name="P5" draw:layer="layout" svg:width="22.859cm" svg:height="1.65cm" svg:x="1.016cm" svg:y="0.305cm">
          <text:p text:style-name="P4"><text:span text:style-name="T9">Project Structure &amp; Tech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58" draw:text-style-name="P5" draw:layer="layout" svg:width="11.429cm" svg:height="0.888cm" svg:x="0.762cm" svg:y="2.54cm">
          <text:p text:style-name="P4"><text:span text:style-name="T25">Folder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59" draw:text-style-name="P5" draw:layer="layout" svg:width="10.667cm" svg:height="0.761cm" svg:x="1.016cm" svg:y="3.607cm">
          <text:p text:style-name="P4"><text:span text:style-name="T49">rapido_projec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60" draw:text-style-name="P5" draw:layer="layout" svg:width="10.667cm" svg:height="0.761cm" svg:x="1.473cm" svg:y="4.445cm">
          <text:p text:style-name="P4"><text:span text:style-name="T50">├── </text:span><text:span text:style-name="T50">data/ <text:s/>(7 fil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1" draw:text-style-name="P5" draw:layer="layout" svg:width="10.667cm" svg:height="0.761cm" svg:x="1.473cm" svg:y="5.283cm">
          <text:p text:style-name="P4"><text:span text:style-name="T50">├── </text:span><text:span text:style-name="T50">models/ <text:s/>(4 .pk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62" draw:text-style-name="P5" draw:layer="layout" svg:width="10.667cm" svg:height="0.761cm" svg:x="1.473cm" svg:y="6.121cm">
          <text:p text:style-name="P4"><text:span text:style-name="T51">├── </text:span><text:span text:style-name="T51">util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63" draw:text-style-name="P5" draw:layer="layout" svg:width="10.667cm" svg:height="0.761cm" svg:x="1.93cm" svg:y="6.96cm">
          <text:p text:style-name="P4"><text:span text:style-name="T50">│ <text:s text:c="2"/>├── </text:span><text:span text:style-name="T50">data_loader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64" draw:text-style-name="P5" draw:layer="layout" svg:width="10.667cm" svg:height="0.761cm" svg:x="1.93cm" svg:y="7.798cm">
          <text:p text:style-name="P4"><text:span text:style-name="T50">│ <text:s text:c="2"/>├── </text:span><text:span text:style-name="T50">preprocessin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65" draw:text-style-name="P5" draw:layer="layout" svg:width="10.667cm" svg:height="0.761cm" svg:x="1.93cm" svg:y="8.636cm">
          <text:p text:style-name="P4"><text:span text:style-name="T50">│ <text:s text:c="2"/>├── </text:span><text:span text:style-name="T50">model_trainin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6" draw:text-style-name="P5" draw:layer="layout" svg:width="10.667cm" svg:height="0.761cm" svg:x="1.93cm" svg:y="9.474cm">
          <text:p text:style-name="P4"><text:span text:style-name="T50">│ <text:s text:c="2"/>├── </text:span><text:span text:style-name="T50">eda_utils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67" draw:text-style-name="P5" draw:layer="layout" svg:width="10.667cm" svg:height="0.761cm" svg:x="1.93cm" svg:y="10.312cm">
          <text:p text:style-name="P4"><text:span text:style-name="T50">│ <text:s text:c="2"/>└── </text:span><text:span text:style-name="T50">sql_manager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8" draw:text-style-name="P5" draw:layer="layout" svg:width="10.667cm" svg:height="0.761cm" svg:x="1.473cm" svg:y="11.151cm">
          <text:p text:style-name="P4"><text:span text:style-name="T52">├── </text:span><text:span text:style-name="T52">app/streamlit_app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69" draw:text-style-name="P5" draw:layer="layout" svg:width="10.667cm" svg:height="0.761cm" svg:x="1.473cm" svg:y="11.989cm">
          <text:p text:style-name="P4"><text:span text:style-name="T50">├── </text:span><text:span text:style-name="T50">train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70" draw:text-style-name="P5" draw:layer="layout" svg:width="10.667cm" svg:height="0.761cm" svg:x="1.473cm" svg:y="12.827cm">
          <text:p text:style-name="P4"><text:span text:style-name="T53">└── </text:span><text:span text:style-name="T53">.env <text:s/>(credentia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71" draw:text-style-name="P5" draw:layer="layout" svg:width="11.175cm" svg:height="0.888cm" svg:x="13.462cm" svg:y="2.54cm">
          <text:p text:style-name="P4"><text:span text:style-name="T25">Tech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" draw:text-style-name="P6" draw:layer="layout" svg:width="11.175cm" svg:height="1.117cm" svg:x="13.462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72" draw:text-style-name="P5" draw:layer="layout" svg:width="3.047cm" svg:height="0.659cm" svg:x="13.843cm" svg:y="3.835cm">
          <text:p text:style-name="P4"><text:span text:style-name="T54">Langua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73" draw:text-style-name="P5" draw:layer="layout" svg:width="7.365cm" svg:height="0.659cm" svg:x="17.018cm" svg:y="3.835cm">
          <text:p text:style-name="P4"><text:span text:style-name="T7">Python 3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8" draw:text-style-name="P6" draw:layer="layout" svg:width="11.175cm" svg:height="1.117cm" svg:x="13.462cm" svg:y="4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74" draw:text-style-name="P5" draw:layer="layout" svg:width="3.047cm" svg:height="0.659cm" svg:x="13.843cm" svg:y="5.182cm">
          <text:p text:style-name="P4"><text:span text:style-name="T55">M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75" draw:text-style-name="P5" draw:layer="layout" svg:width="7.365cm" svg:height="0.659cm" svg:x="17.018cm" svg:y="5.182cm">
          <text:p text:style-name="P4"><text:span text:style-name="T7">Scikit-learn (RF + GB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44" draw:text-style-name="P6" draw:layer="layout" svg:width="11.175cm" svg:height="1.117cm" svg:x="13.462cm" svg:y="6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76" draw:text-style-name="P5" draw:layer="layout" svg:width="3.047cm" svg:height="0.659cm" svg:x="13.843cm" svg:y="6.528cm">
          <text:p text:style-name="P4"><text:span text:style-name="T56">Dashboar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77" draw:text-style-name="P5" draw:layer="layout" svg:width="7.365cm" svg:height="0.659cm" svg:x="17.018cm" svg:y="6.528cm">
          <text:p text:style-name="P4"><text:span text:style-name="T7">Streamlit 1.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50" draw:text-style-name="P6" draw:layer="layout" svg:width="11.175cm" svg:height="1.117cm" svg:x="13.462cm" svg:y="7.6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78" draw:text-style-name="P5" draw:layer="layout" svg:width="3.047cm" svg:height="0.659cm" svg:x="13.843cm" svg:y="7.874cm">
          <text:p text:style-name="P4"><text:span text:style-name="T57">Char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79" draw:text-style-name="P5" draw:layer="layout" svg:width="7.365cm" svg:height="0.659cm" svg:x="17.018cm" svg:y="7.874cm">
          <text:p text:style-name="P4"><text:span text:style-name="T7">Plotly 5.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56" draw:text-style-name="P6" draw:layer="layout" svg:width="11.175cm" svg:height="1.117cm" svg:x="13.462cm" svg:y="8.9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80" draw:text-style-name="P5" draw:layer="layout" svg:width="3.047cm" svg:height="0.659cm" svg:x="13.843cm" svg:y="9.22cm">
          <text:p text:style-name="P4"><text:span text:style-name="T58">Datab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81" draw:text-style-name="P5" draw:layer="layout" svg:width="7.365cm" svg:height="0.659cm" svg:x="17.018cm" svg:y="9.22cm">
          <text:p text:style-name="P4"><text:span text:style-name="T7">MySQL + mysql-connector-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95" draw:text-style-name="P6" draw:layer="layout" svg:width="11.175cm" svg:height="1.117cm" svg:x="13.462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82" draw:text-style-name="P5" draw:layer="layout" svg:width="3.047cm" svg:height="0.659cm" svg:x="13.843cm" svg:y="10.566cm">
          <text:p text:style-name="P4"><text:span text:style-name="T59">Da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83" draw:text-style-name="P5" draw:layer="layout" svg:width="7.365cm" svg:height="0.659cm" svg:x="17.018cm" svg:y="10.566cm">
          <text:p text:style-name="P4"><text:span text:style-name="T7">Pandas . NumPy . OpenPyX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62" draw:text-style-name="P6" draw:layer="layout" svg:width="11.175cm" svg:height="1.117cm" svg:x="13.462cm" svg:y="11.6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84" draw:text-style-name="P5" draw:layer="layout" svg:width="3.047cm" svg:height="0.659cm" svg:x="13.843cm" svg:y="11.913cm">
          <text:p text:style-name="P4"><text:span text:style-name="T60">Env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285" draw:text-style-name="P5" draw:layer="layout" svg:width="7.365cm" svg:height="0.659cm" svg:x="17.018cm" svg:y="11.913cm">
          <text:p text:style-name="P4"><text:span text:style-name="T7">python-dotenv (.env fi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6" draw:layer="layout" svg:width="11.175cm" svg:height="1.117cm" svg:x="13.462cm" svg:y="13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286" draw:text-style-name="P5" draw:layer="layout" svg:width="3.047cm" svg:height="0.659cm" svg:x="13.843cm" svg:y="13.259cm">
          <text:p text:style-name="P4"><text:span text:style-name="T54">Deplo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87" draw:text-style-name="P5" draw:layer="layout" svg:width="7.365cm" svg:height="0.659cm" svg:x="17.018cm" svg:y="13.259cm">
          <text:p text:style-name="P4"><text:span text:style-name="T7">localhost:8501 (Streaml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2" presentation:class="page"/>
          <draw:frame draw:name="Notes Placeholder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456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1.429cm" svg:height="11.429cm" svg:x="17.78cm" svg:y="-2.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" draw:style-name="gr3" draw:text-style-name="P3" draw:layer="layout" svg:width="6.349cm" svg:height="6.349cm" svg:x="21.59cm" svg:y="10.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288" draw:text-style-name="P5" draw:layer="layout" svg:width="22.859cm" svg:height="2.158cm" svg:x="1.016cm" svg:y="5.334cm">
          <text:p text:style-name="P4"><text:span text:style-name="T61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89" draw:text-style-name="P5" draw:layer="layout" svg:width="22.859cm" svg:height="1.142cm" svg:x="1.016cm" svg:y="7.493cm">
          <text:p text:style-name="P4"><text:span text:style-name="T62">Rapido - Intelligent Mobility Ins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" draw:text-style-name="P2" draw:layer="layout" svg:width="12.699cm" svg:height="0.101cm" svg:x="1.016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90" draw:text-style-name="P5" draw:layer="layout" svg:width="16.509cm" svg:height="0.71cm" svg:x="1.016cm" svg:y="9.271cm">
          <text:p text:style-name="P4"><text:span text:style-name="T63">✅ <text:s/></text:span><text:span text:style-name="T63">7 Data Files Loaded (5 CSV + 2 XLS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91" draw:text-style-name="P5" draw:layer="layout" svg:width="16.509cm" svg:height="0.71cm" svg:x="1.016cm" svg:y="10.058cm">
          <text:p text:style-name="P4"><text:span text:style-name="T63">✅ <text:s/></text:span><text:span text:style-name="T63">4 ML Models Trained &amp; Deploy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2" draw:text-style-name="P5" draw:layer="layout" svg:width="16.509cm" svg:height="0.71cm" svg:x="1.016cm" svg:y="10.846cm">
          <text:p text:style-name="P4"><text:span text:style-name="T63">✅ <text:s/></text:span><text:span text:style-name="T63">92.5% Classification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93" draw:text-style-name="P5" draw:layer="layout" svg:width="16.509cm" svg:height="0.71cm" svg:x="1.016cm" svg:y="11.633cm">
          <text:p text:style-name="P4"><text:span text:style-name="T63">✅ <text:s/></text:span><text:span text:style-name="T63">Streamlit Dashboard (6 Tab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94" draw:text-style-name="P5" draw:layer="layout" svg:width="16.509cm" svg:height="0.71cm" svg:x="1.016cm" svg:y="12.421cm">
          <text:p text:style-name="P4"><text:span text:style-name="T63">✅ <text:s/></text:span><text:span text:style-name="T63">MySQL SQL Analytics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95" draw:text-style-name="P5" draw:layer="layout" svg:width="16.509cm" svg:height="0.71cm" svg:x="1.016cm" svg:y="13.208cm">
          <text:p text:style-name="P4"><text:span text:style-name="T63">✅ <text:s/></text:span><text:span text:style-name="T63">60/60 Requirements Satis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96" draw:text-style-name="P5" draw:layer="layout" svg:width="12.699cm" svg:height="0.71cm" svg:x="1.016cm" svg:y="13.259cm">
          <text:p text:style-name="P4"><text:span text:style-name="T17">Project by: Lakshana Murugesan <text:s/>| <text:s/>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15.239cm" svg:height="8.572cm" svg:x="1.905cm" svg:y="3.175cm" draw:page-number="13" presentation:class="page"/>
          <draw:frame draw:name="Notes Placeholder 2" presentation:style-name="pr1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apido Intelligent Mobility Insights</dc:title>
    <dc:subject>PptxGenJS Presentation</dc:subject>
    <meta:initial-creator>Rapido Analytics Team</meta:initial-creator>
    <meta:editing-cycles>2</meta:editing-cycles>
    <meta:creation-date>2026-06-27T10:42:39</meta:creation-date>
    <dc:date>2026-06-29T12:52:12.980679922</dc:date>
    <meta:editing-duration>PT2M32S</meta:editing-duration>
    <meta:generator>LibreOffice/7.3.7.2$Linux_X86_64 LibreOffice_project/30$Build-2</meta:generator>
    <meta:document-statistic meta:object-count="492"/>
    <meta:user-defined meta:name="AppVersion">16.0000</meta:user-defined>
    <meta:user-defined meta:name="Company">PptxGenJS</meta:user-defined>
    <meta:user-defined meta:name="Notes" meta:value-type="float">13</meta:user-defined>
    <meta:user-defined meta:name="PresentationFormat">On-screen Show (16:9)</meta:user-defined>
    <meta:user-defined meta:name="Slides" meta:value-type="float">13</meta:user-defined>
  </office:meta>
</office:document-meta>
</file>